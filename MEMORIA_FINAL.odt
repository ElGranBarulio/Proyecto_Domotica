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E8000001C8E6A79CEC.png" manifest:media-type="image/png"/>
  <manifest:file-entry manifest:full-path="Pictures/100000010000020E000002A0589E5170.png" manifest:media-type="image/png"/>
  <manifest:file-entry manifest:full-path="Pictures/100000010000022E0000017E678FF809.png" manifest:media-type="image/png"/>
  <manifest:file-entry manifest:full-path="Pictures/10000001000004000000060080C9E24E.png" manifest:media-type="image/png"/>
  <manifest:file-entry manifest:full-path="Pictures/100000010000032A0000017768AD4F58.png" manifest:media-type="image/png"/>
  <manifest:file-entry manifest:full-path="Pictures/1000000100000284000000BA217D222B.png" manifest:media-type="image/png"/>
  <manifest:file-entry manifest:full-path="Pictures/100000010000032F00000322B1DF55D5.png" manifest:media-type="image/png"/>
  <manifest:file-entry manifest:full-path="Pictures/100000010000031F000001992213BF5A.png" manifest:media-type="image/png"/>
  <manifest:file-entry manifest:full-path="Pictures/1000000100000309000001617F865A6B.png" manifest:media-type="image/png"/>
  <manifest:file-entry manifest:full-path="Pictures/10000001000003380000025B8BB30195.png" manifest:media-type="image/png"/>
  <manifest:file-entry manifest:full-path="Pictures/100000010000062700000143A4AAF74C.png" manifest:media-type="image/png"/>
  <manifest:file-entry manifest:full-path="Pictures/1000000100000203000000DFFD49E97A.png" manifest:media-type="image/png"/>
  <manifest:file-entry manifest:full-path="Pictures/10000001000001D60000020CCADCC06D.png" manifest:media-type="image/png"/>
  <manifest:file-entry manifest:full-path="Pictures/100000010000029500000035668FD10B.png" manifest:media-type="image/png"/>
  <manifest:file-entry manifest:full-path="Pictures/10000001000002C800000287AB853A90.png" manifest:media-type="image/png"/>
  <manifest:file-entry manifest:full-path="Pictures/10000001000001C400000177C2D6930E.png" manifest:media-type="image/png"/>
  <manifest:file-entry manifest:full-path="Pictures/1000000100000322000001336342CD85.png" manifest:media-type="image/png"/>
  <manifest:file-entry manifest:full-path="Pictures/100000010000030F000001322D042520.png" manifest:media-type="image/png"/>
  <manifest:file-entry manifest:full-path="Pictures/1000000100000621000000FF5C8831A0.png" manifest:media-type="image/png"/>
  <manifest:file-entry manifest:full-path="Pictures/10000001000001CC000001A045DE3053.png" manifest:media-type="image/png"/>
  <manifest:file-entry manifest:full-path="Pictures/100000010000029C0000011464A41DE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Consolas, 'Courier New', monospace"/>
  </office:font-face-decls>
  <office:automatic-styles>
    <style:style style:name="Tabla1" style:family="table">
      <style:table-properties style:width="5.868cm" table:align="left"/>
    </style:style>
    <style:style style:name="Tabla1.A" style:family="table-column">
      <style:table-column-properties style:column-width="1.177cm"/>
    </style:style>
    <style:style style:name="Tabla1.B" style:family="table-column">
      <style:table-column-properties style:column-width="2.671cm"/>
    </style:style>
    <style:style style:name="Tabla1.C" style:family="table-column">
      <style:table-column-properties style:column-width="2.021cm"/>
    </style:style>
    <style:style style:name="Tabla1.A1" style:family="table-cell">
      <style:table-cell-properties style:vertical-align="middle" fo:padding="0.049cm" fo:border="none"/>
    </style:style>
    <style:style style:name="Tabla2" style:family="table">
      <style:table-properties style:width="4.163cm" table:align="left"/>
    </style:style>
    <style:style style:name="Tabla2.A" style:family="table-column">
      <style:table-column-properties style:column-width="1.353cm"/>
    </style:style>
    <style:style style:name="Tabla2.B" style:family="table-column">
      <style:table-column-properties style:column-width="1.365cm"/>
    </style:style>
    <style:style style:name="Tabla2.C" style:family="table-column">
      <style:table-column-properties style:column-width="1.445cm"/>
    </style:style>
    <style:style style:name="Tabla2.A1" style:family="table-cell">
      <style:table-cell-properties style:vertical-align="middle" fo:padding="0.049cm" fo:border="none"/>
    </style:style>
    <style:style style:name="P1" style:family="paragraph" style:parent-style-name="Heading_20_1">
      <style:text-properties officeooo:paragraph-rsid="0002930f"/>
    </style:style>
    <style:style style:name="P2" style:family="paragraph" style:parent-style-name="Heading_20_2">
      <style:text-properties officeooo:paragraph-rsid="0002930f"/>
    </style:style>
    <style:style style:name="P3" style:family="paragraph" style:parent-style-name="Heading_20_3">
      <style:text-properties officeooo:paragraph-rsid="0002930f"/>
    </style:style>
    <style:style style:name="P4" style:family="paragraph" style:parent-style-name="Text_20_body">
      <style:text-properties officeooo:paragraph-rsid="0002930f"/>
    </style:style>
    <style:style style:name="P5" style:family="paragraph" style:parent-style-name="Quotations">
      <style:text-properties officeooo:paragraph-rsid="0002930f"/>
    </style:style>
    <style:style style:name="P6" style:family="paragraph" style:parent-style-name="Text_20_body" style:list-style-name="L1">
      <style:text-properties officeooo:paragraph-rsid="0002930f"/>
    </style:style>
    <style:style style:name="P7" style:family="paragraph" style:parent-style-name="Text_20_body" style:list-style-name="L2">
      <style:text-properties officeooo:paragraph-rsid="0002930f"/>
    </style:style>
    <style:style style:name="P8" style:family="paragraph" style:parent-style-name="Text_20_body" style:list-style-name="L3">
      <style:paragraph-properties fo:margin-top="0cm" fo:margin-bottom="0cm" style:contextual-spacing="false"/>
      <style:text-properties officeooo:paragraph-rsid="0002930f"/>
    </style:style>
    <style:style style:name="P9" style:family="paragraph" style:parent-style-name="Text_20_body" style:list-style-name="L3">
      <style:text-properties officeooo:paragraph-rsid="0002930f"/>
    </style:style>
    <style:style style:name="P10" style:family="paragraph" style:parent-style-name="Heading_20_2">
      <style:paragraph-properties fo:margin-top="0cm" fo:margin-bottom="0.247cm" style:contextual-spacing="false" fo:line-height="115%"/>
      <style:text-properties officeooo:paragraph-rsid="0002930f"/>
    </style:style>
    <style:style style:name="P11" style:family="paragraph" style:parent-style-name="Heading_20_3">
      <style:paragraph-properties fo:margin-top="0cm" fo:margin-bottom="0.247cm" style:contextual-spacing="false" fo:line-height="115%"/>
      <style:text-properties officeooo:paragraph-rsid="0002930f"/>
    </style:style>
    <style:style style:name="P12" style:family="paragraph" style:parent-style-name="Text_20_body" style:list-style-name="L4">
      <style:text-properties officeooo:paragraph-rsid="0002930f"/>
    </style:style>
    <style:style style:name="P13" style:family="paragraph" style:parent-style-name="Text_20_body" style:list-style-name="L4">
      <style:paragraph-properties fo:margin-top="0cm" fo:margin-bottom="0cm" style:contextual-spacing="false"/>
      <style:text-properties officeooo:paragraph-rsid="0002930f"/>
    </style:style>
    <style:style style:name="P14" style:family="paragraph" style:parent-style-name="Text_20_body" style:list-style-name="L5">
      <style:text-properties officeooo:paragraph-rsid="0002930f"/>
    </style:style>
    <style:style style:name="P15" style:family="paragraph" style:parent-style-name="Text_20_body" style:list-style-name="L5">
      <style:paragraph-properties fo:margin-top="0cm" fo:margin-bottom="0cm" style:contextual-spacing="false"/>
      <style:text-properties officeooo:paragraph-rsid="0002930f"/>
    </style:style>
    <style:style style:name="P16" style:family="paragraph" style:parent-style-name="Text_20_body" style:list-style-name="L6">
      <style:text-properties officeooo:paragraph-rsid="0002930f"/>
    </style:style>
    <style:style style:name="P17" style:family="paragraph" style:parent-style-name="Text_20_body" style:list-style-name="L7">
      <style:paragraph-properties fo:margin-top="0cm" fo:margin-bottom="0cm" style:contextual-spacing="false"/>
      <style:text-properties officeooo:paragraph-rsid="0002930f"/>
    </style:style>
    <style:style style:name="P18" style:family="paragraph" style:parent-style-name="Text_20_body" style:list-style-name="L7">
      <style:text-properties officeooo:paragraph-rsid="0002930f"/>
    </style:style>
    <style:style style:name="P19" style:family="paragraph" style:parent-style-name="Text_20_body" style:list-style-name="L8">
      <style:paragraph-properties fo:margin-top="0cm" fo:margin-bottom="0cm" style:contextual-spacing="false"/>
      <style:text-properties officeooo:paragraph-rsid="0002930f"/>
    </style:style>
    <style:style style:name="P20" style:family="paragraph" style:parent-style-name="Text_20_body" style:list-style-name="L8">
      <style:text-properties officeooo:paragraph-rsid="0002930f"/>
    </style:style>
    <style:style style:name="P21" style:family="paragraph" style:parent-style-name="Text_20_body" style:list-style-name="L9">
      <style:paragraph-properties fo:margin-top="0cm" fo:margin-bottom="0cm" style:contextual-spacing="false"/>
      <style:text-properties officeooo:paragraph-rsid="0002930f"/>
    </style:style>
    <style:style style:name="P22" style:family="paragraph" style:parent-style-name="Text_20_body" style:list-style-name="L9">
      <style:text-properties officeooo:paragraph-rsid="0002930f"/>
    </style:style>
    <style:style style:name="P23" style:family="paragraph" style:parent-style-name="Text_20_body" style:list-style-name="L10">
      <style:text-properties officeooo:paragraph-rsid="0002930f"/>
    </style:style>
    <style:style style:name="P24" style:family="paragraph" style:parent-style-name="Heading_20_1">
      <style:paragraph-properties fo:margin-top="0cm" fo:margin-bottom="0.247cm" style:contextual-spacing="false" fo:line-height="115%"/>
      <style:text-properties officeooo:paragraph-rsid="0002930f"/>
    </style:style>
    <style:style style:name="P25" style:family="paragraph" style:parent-style-name="Text_20_body" style:list-style-name="L11">
      <style:text-properties officeooo:paragraph-rsid="0002930f"/>
    </style:style>
    <style:style style:name="P26" style:family="paragraph" style:parent-style-name="Text_20_body">
      <style:text-properties fo:font-style="italic" officeooo:paragraph-rsid="0002930f" style:font-style-asian="italic" style:font-style-complex="italic"/>
    </style:style>
    <style:style style:name="P27" style:family="paragraph" style:parent-style-name="Text_20_body" style:list-style-name="L12">
      <style:text-properties officeooo:paragraph-rsid="0002930f"/>
    </style:style>
    <style:style style:name="P28" style:family="paragraph" style:parent-style-name="Heading_20_1">
      <style:paragraph-properties fo:margin-top="0cm" fo:margin-bottom="0.247cm" style:contextual-spacing="false" fo:line-height="115%"/>
    </style:style>
    <style:style style:name="P29" style:family="paragraph" style:parent-style-name="Heading_20_2">
      <style:paragraph-properties fo:margin-top="0cm" fo:margin-bottom="0.247cm" style:contextual-spacing="false" fo:line-height="115%"/>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Preformatted_20_Text" style:list-style-name="L15">
      <style:paragraph-properties fo:margin-top="0cm" fo:margin-bottom="0.247cm" style:contextual-spacing="false" fo:line-height="115%"/>
    </style:style>
    <style:style style:name="P34" style:family="paragraph" style:parent-style-name="Text_20_body" style:list-style-name="L16"/>
    <style:style style:name="P35" style:family="paragraph" style:parent-style-name="Preformatted_20_Text" style:list-style-name="L16">
      <style:paragraph-properties fo:margin-top="0cm" fo:margin-bottom="0.247cm" style:contextual-spacing="false" fo:line-height="115%"/>
    </style:style>
    <style:style style:name="P36" style:family="paragraph" style:parent-style-name="Preformatted_20_Text">
      <style:paragraph-properties fo:margin-top="0cm" fo:margin-bottom="0.247cm" style:contextual-spacing="false" fo:line-height="115%"/>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paragraph-properties fo:margin-top="0cm" fo:margin-bottom="0.247cm" style:contextual-spacing="false" fo:line-height="115%"/>
    </style:style>
    <style:style style:name="P44" style:family="paragraph" style:parent-style-name="Text_20_body" style:list-style-name="L23"/>
    <style:style style:name="P45" style:family="paragraph" style:parent-style-name="Text_20_body">
      <style:text-properties fo:font-style="italic" style:font-style-asian="italic" style:font-style-complex="italic"/>
    </style:style>
    <style:style style:name="P46" style:family="paragraph" style:parent-style-name="Preformatted_20_Text">
      <style:paragraph-properties fo:margin-left="0cm" fo:margin-right="0cm" fo:margin-top="0cm" fo:margin-bottom="0.247cm" style:contextual-spacing="false" fo:line-height="115%" fo:text-indent="0cm" style:auto-text-indent="false"/>
      <style:text-properties fo:font-style="italic" officeooo:paragraph-rsid="000b9f7d" style:font-style-asian="italic" style:font-style-complex="italic"/>
    </style:style>
    <style:style style:name="P47" style:family="paragraph" style:parent-style-name="Preformatted_20_Text">
      <style:paragraph-properties fo:margin-top="0cm" fo:margin-bottom="0.247cm" style:contextual-spacing="false" fo:line-height="115%"/>
      <style:text-properties fo:font-style="italic" officeooo:paragraph-rsid="000b9f7d" style:font-style-asian="italic" style:font-style-complex="italic"/>
    </style:style>
    <style:style style:name="P48" style:family="paragraph" style:parent-style-name="Preformatted_20_Text">
      <style:paragraph-properties fo:line-height="115%"/>
      <style:text-properties fo:font-style="italic" officeooo:paragraph-rsid="000b9f7d" style:font-style-asian="italic" style:font-style-complex="italic"/>
    </style:style>
    <style:style style:name="P49" style:family="paragraph" style:parent-style-name="Text_20_body">
      <style:text-properties officeooo:paragraph-rsid="000b9f7d"/>
    </style:style>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4"/>
    <style:style style:name="P52" style:family="paragraph" style:parent-style-name="Text_20_body" style:list-style-name="L25">
      <style:paragraph-properties fo:margin-top="0cm" fo:margin-bottom="0cm" style:contextual-spacing="false"/>
    </style:style>
    <style:style style:name="P53" style:family="paragraph" style:parent-style-name="Text_20_body" style:list-style-name="L25"/>
    <style:style style:name="P54" style:family="paragraph" style:parent-style-name="Preformatted_20_Text">
      <style:paragraph-properties fo:margin-left="0cm" fo:margin-right="0cm" fo:line-height="115%" fo:text-indent="0cm" style:auto-text-indent="false"/>
      <style:text-properties officeooo:paragraph-rsid="000b9f7d"/>
    </style:style>
    <style:style style:name="P55" style:family="paragraph" style:parent-style-name="Text_20_body" style:list-style-name="L26">
      <style:paragraph-properties fo:margin-top="0cm" fo:margin-bottom="0cm" style:contextual-spacing="false"/>
    </style:style>
    <style:style style:name="P56" style:family="paragraph" style:parent-style-name="Text_20_body" style:list-style-name="L26"/>
    <style:style style:name="P57" style:family="paragraph" style:parent-style-name="Text_20_body" style:list-style-name="L27">
      <style:paragraph-properties fo:margin-top="0cm" fo:margin-bottom="0cm" style:contextual-spacing="false"/>
    </style:style>
    <style:style style:name="P58" style:family="paragraph" style:parent-style-name="Text_20_body" style:list-style-name="L27"/>
    <style:style style:name="P59" style:family="paragraph" style:parent-style-name="Preformatted_20_Text">
      <style:paragraph-properties fo:margin-left="0cm" fo:margin-right="0cm" fo:line-height="115%" fo:text-indent="0cm" style:auto-text-indent="false"/>
      <style:text-properties fo:font-style="italic" officeooo:paragraph-rsid="000b9f7d" style:font-style-asian="italic" style:font-style-complex="italic"/>
    </style:style>
    <style:style style:name="P60" style:family="paragraph" style:parent-style-name="Heading_20_3">
      <style:paragraph-properties fo:margin-top="0cm" fo:margin-bottom="0.247cm" style:contextual-spacing="false" fo:line-height="115%"/>
    </style:style>
    <style:style style:name="P61" style:family="paragraph" style:parent-style-name="Quotations">
      <style:paragraph-properties fo:margin-top="0cm" fo:margin-bottom="0.247cm" style:contextual-spacing="false" fo:line-height="115%"/>
    </style:style>
    <style:style style:name="P62" style:family="paragraph" style:parent-style-name="Text_20_body">
      <style:text-properties officeooo:paragraph-rsid="0007dcd9"/>
    </style:style>
    <style:style style:name="P63" style:family="paragraph" style:parent-style-name="Text_20_body">
      <style:text-properties fo:font-style="italic" officeooo:paragraph-rsid="0007dcd9" style:font-style-asian="italic" style:font-style-complex="italic"/>
    </style:style>
    <style:style style:name="P64" style:family="paragraph" style:parent-style-name="Text_20_body">
      <style:text-properties fo:font-style="normal" officeooo:paragraph-rsid="0007dcd9" style:font-style-asian="normal" style:font-style-complex="normal"/>
    </style:style>
    <style:style style:name="P65" style:family="paragraph" style:parent-style-name="Text_20_body" style:list-style-name="L28">
      <style:paragraph-properties fo:margin-top="0cm" fo:margin-bottom="0cm" style:contextual-spacing="false"/>
      <style:text-properties officeooo:paragraph-rsid="0007dcd9"/>
    </style:style>
    <style:style style:name="P66" style:family="paragraph" style:parent-style-name="Text_20_body" style:list-style-name="L28">
      <style:paragraph-properties fo:margin-top="0cm" fo:margin-bottom="0cm" style:contextual-spacing="false"/>
    </style:style>
    <style:style style:name="P67" style:family="paragraph" style:parent-style-name="Text_20_body" style:list-style-name="L28"/>
    <style:style style:name="P68" style:family="paragraph" style:parent-style-name="Text_20_body" style:list-style-name="L29">
      <style:paragraph-properties fo:margin-top="0cm" fo:margin-bottom="0cm" style:contextual-spacing="false"/>
    </style:style>
    <style:style style:name="P69" style:family="paragraph" style:parent-style-name="Text_20_body" style:list-style-name="L29"/>
    <style:style style:name="P70" style:family="paragraph" style:parent-style-name="Text_20_body" style:list-style-name="L30">
      <style:paragraph-properties fo:margin-top="0cm" fo:margin-bottom="0cm" style:contextual-spacing="false"/>
    </style:style>
    <style:style style:name="P71" style:family="paragraph" style:parent-style-name="Text_20_body" style:list-style-name="L30"/>
    <style:style style:name="P72" style:family="paragraph" style:parent-style-name="Text_20_body" style:list-style-name="L31">
      <style:paragraph-properties fo:margin-top="0cm" fo:margin-bottom="0cm" style:contextual-spacing="false"/>
    </style:style>
    <style:style style:name="P73" style:family="paragraph" style:parent-style-name="Text_20_body" style:list-style-name="L31"/>
    <style:style style:name="P74" style:family="paragraph" style:parent-style-name="Text_20_body" style:list-style-name="L32">
      <style:paragraph-properties fo:margin-top="0cm" fo:margin-bottom="0cm" style:contextual-spacing="false"/>
    </style:style>
    <style:style style:name="P75" style:family="paragraph" style:parent-style-name="Text_20_body" style:list-style-name="L32"/>
    <style:style style:name="P76" style:family="paragraph" style:parent-style-name="Text_20_body" style:list-style-name="L33">
      <style:paragraph-properties fo:margin-top="0cm" fo:margin-bottom="0cm" style:contextual-spacing="false"/>
      <style:text-properties fo:font-style="italic" style:font-style-asian="italic" style:font-style-complex="italic"/>
    </style:style>
    <style:style style:name="P77" style:family="paragraph" style:parent-style-name="Text_20_body" style:list-style-name="L33">
      <style:text-properties fo:font-style="italic" style:font-style-asian="italic" style:font-style-complex="italic"/>
    </style:style>
    <style:style style:name="P78" style:family="paragraph" style:parent-style-name="Text_20_body" style:list-style-name="L34">
      <style:paragraph-properties fo:margin-top="0cm" fo:margin-bottom="0cm" style:contextual-spacing="false"/>
    </style:style>
    <style:style style:name="P79" style:family="paragraph" style:parent-style-name="Text_20_body" style:list-style-name="L34"/>
    <style:style style:name="P80" style:family="paragraph" style:parent-style-name="Text_20_body" style:list-style-name="L35">
      <style:paragraph-properties fo:margin-top="0cm" fo:margin-bottom="0cm" style:contextual-spacing="false"/>
    </style:style>
    <style:style style:name="P81" style:family="paragraph" style:parent-style-name="Text_20_body" style:list-style-name="L35"/>
    <style:style style:name="P82" style:family="paragraph" style:parent-style-name="Text_20_body" style:list-style-name="L36">
      <style:paragraph-properties fo:margin-top="0cm" fo:margin-bottom="0cm" style:contextual-spacing="false"/>
    </style:style>
    <style:style style:name="P83" style:family="paragraph" style:parent-style-name="Text_20_body" style:list-style-name="L36"/>
    <style:style style:name="P84" style:family="paragraph" style:parent-style-name="Text_20_body" style:list-style-name="L37">
      <style:paragraph-properties fo:margin-top="0cm" fo:margin-bottom="0cm" style:contextual-spacing="false"/>
    </style:style>
    <style:style style:name="P85" style:family="paragraph" style:parent-style-name="Text_20_body" style:list-style-name="L37"/>
    <style:style style:name="P86" style:family="paragraph" style:parent-style-name="Text_20_body" style:list-style-name="L38">
      <style:paragraph-properties fo:margin-top="0cm" fo:margin-bottom="0cm" style:contextual-spacing="false"/>
    </style:style>
    <style:style style:name="P87" style:family="paragraph" style:parent-style-name="Text_20_body" style:list-style-name="L38"/>
    <style:style style:name="P88" style:family="paragraph" style:parent-style-name="Text_20_body" style:list-style-name="L39">
      <style:paragraph-properties fo:margin-top="0cm" fo:margin-bottom="0cm" style:contextual-spacing="false"/>
      <style:text-properties fo:font-style="italic" style:font-style-asian="italic" style:font-style-complex="italic"/>
    </style:style>
    <style:style style:name="P89" style:family="paragraph" style:parent-style-name="Text_20_body" style:list-style-name="L39">
      <style:text-properties fo:font-style="italic" style:font-style-asian="italic" style:font-style-complex="italic"/>
    </style:style>
    <style:style style:name="P90" style:family="paragraph" style:parent-style-name="Text_20_body" style:list-style-name="L40">
      <style:paragraph-properties fo:margin-top="0cm" fo:margin-bottom="0cm" style:contextual-spacing="false"/>
    </style:style>
    <style:style style:name="P91" style:family="paragraph" style:parent-style-name="Text_20_body" style:list-style-name="L40"/>
    <style:style style:name="P92" style:family="paragraph" style:parent-style-name="Text_20_body" style:list-style-name="L41">
      <style:paragraph-properties fo:margin-top="0cm" fo:margin-bottom="0cm" style:contextual-spacing="false"/>
    </style:style>
    <style:style style:name="P93" style:family="paragraph" style:parent-style-name="Text_20_body" style:list-style-name="L41"/>
    <style:style style:name="P94" style:family="paragraph" style:parent-style-name="Text_20_body" style:list-style-name="L42">
      <style:paragraph-properties fo:margin-top="0cm" fo:margin-bottom="0cm" style:contextual-spacing="false"/>
    </style:style>
    <style:style style:name="P95" style:family="paragraph" style:parent-style-name="Text_20_body" style:list-style-name="L42"/>
    <style:style style:name="P96" style:family="paragraph" style:parent-style-name="Text_20_body" style:list-style-name="L43">
      <style:paragraph-properties fo:margin-top="0cm" fo:margin-bottom="0cm" style:contextual-spacing="false"/>
    </style:style>
    <style:style style:name="P97" style:family="paragraph" style:parent-style-name="Text_20_body" style:list-style-name="L43"/>
    <style:style style:name="P98" style:family="paragraph" style:parent-style-name="Text_20_body" style:list-style-name="L44">
      <style:paragraph-properties fo:margin-top="0cm" fo:margin-bottom="0cm" style:contextual-spacing="false"/>
      <style:text-properties fo:font-style="italic" style:font-style-asian="italic" style:font-style-complex="italic"/>
    </style:style>
    <style:style style:name="P99" style:family="paragraph" style:parent-style-name="Text_20_body" style:list-style-name="L44">
      <style:text-properties fo:font-style="italic" style:font-style-asian="italic" style:font-style-complex="italic"/>
    </style:style>
    <style:style style:name="P100" style:family="paragraph" style:parent-style-name="Text_20_body" style:list-style-name="L45">
      <style:paragraph-properties fo:margin-top="0cm" fo:margin-bottom="0cm" style:contextual-spacing="false"/>
    </style:style>
    <style:style style:name="P101" style:family="paragraph" style:parent-style-name="Text_20_body" style:list-style-name="L45"/>
    <style:style style:name="P102" style:family="paragraph" style:parent-style-name="Text_20_body" style:list-style-name="L46">
      <style:paragraph-properties fo:margin-top="0cm" fo:margin-bottom="0cm" style:contextual-spacing="false"/>
    </style:style>
    <style:style style:name="P103" style:family="paragraph" style:parent-style-name="Text_20_body" style:list-style-name="L46"/>
    <style:style style:name="P104" style:family="paragraph" style:parent-style-name="Text_20_body" style:list-style-name="L47">
      <style:paragraph-properties fo:margin-top="0cm" fo:margin-bottom="0cm" style:contextual-spacing="false"/>
    </style:style>
    <style:style style:name="P105" style:family="paragraph" style:parent-style-name="Text_20_body" style:list-style-name="L47"/>
    <style:style style:name="P106" style:family="paragraph" style:parent-style-name="Text_20_body" style:list-style-name="L48">
      <style:paragraph-properties fo:margin-top="0cm" fo:margin-bottom="0cm" style:contextual-spacing="false"/>
    </style:style>
    <style:style style:name="P107" style:family="paragraph" style:parent-style-name="Text_20_body" style:list-style-name="L48"/>
    <style:style style:name="P108" style:family="paragraph" style:parent-style-name="Quotations">
      <style:paragraph-properties fo:margin-left="0cm" fo:margin-top="0cm" fo:margin-bottom="0.247cm" style:contextual-spacing="false" fo:line-height="115%" fo:text-indent="0cm" style:auto-text-indent="false"/>
      <style:text-properties officeooo:paragraph-rsid="000566e6"/>
    </style:style>
    <style:style style:name="P109" style:family="paragraph" style:parent-style-name="Text_20_body" style:list-style-name="L49"/>
    <style:style style:name="P110" style:family="paragraph" style:parent-style-name="Text_20_body" style:list-style-name="L50"/>
    <style:style style:name="P111" style:family="paragraph" style:parent-style-name="Text_20_body" style:list-style-name="L51"/>
    <style:style style:name="P112" style:family="paragraph" style:parent-style-name="Text_20_body" style:list-style-name="L52"/>
    <style:style style:name="P113" style:family="paragraph" style:parent-style-name="Text_20_body" style:list-style-name="L52">
      <style:text-properties officeooo:paragraph-rsid="000566e6"/>
    </style:style>
    <style:style style:name="P114" style:family="paragraph" style:parent-style-name="Heading_20_2">
      <style:paragraph-properties fo:margin-top="0cm" fo:margin-bottom="0.247cm" style:contextual-spacing="false" fo:line-height="115%"/>
      <style:text-properties officeooo:paragraph-rsid="000566e6"/>
    </style:style>
    <style:style style:name="P115" style:family="paragraph" style:parent-style-name="Text_20_body" style:list-style-name="L53"/>
    <style:style style:name="P116" style:family="paragraph" style:parent-style-name="Text_20_body" style:list-style-name="L54"/>
    <style:style style:name="P117" style:family="paragraph" style:parent-style-name="Text_20_body" style:list-style-name="L55"/>
    <style:style style:name="P118" style:family="paragraph" style:parent-style-name="Text_20_body" style:list-style-name="L56"/>
    <style:style style:name="P119" style:family="paragraph" style:parent-style-name="Text_20_body" style:list-style-name="L57"/>
    <style:style style:name="P120" style:family="paragraph" style:parent-style-name="Text_20_body" style:list-style-name="L58">
      <style:text-properties fo:font-style="italic" style:font-style-asian="italic" style:font-style-complex="italic"/>
    </style:style>
    <style:style style:name="P121" style:family="paragraph" style:parent-style-name="Text_20_body">
      <style:text-properties officeooo:paragraph-rsid="000747c1"/>
    </style:style>
    <style:style style:name="P122" style:family="paragraph" style:parent-style-name="Text_20_body" style:list-style-name="L59">
      <style:paragraph-properties fo:margin-top="0cm" fo:margin-bottom="0cm" style:contextual-spacing="false"/>
    </style:style>
    <style:style style:name="P123" style:family="paragraph" style:parent-style-name="Text_20_body" style:list-style-name="L59"/>
    <style:style style:name="P124" style:family="paragraph" style:parent-style-name="Text_20_body" style:list-style-name="L60">
      <style:paragraph-properties fo:margin-top="0cm" fo:margin-bottom="0cm" style:contextual-spacing="false"/>
    </style:style>
    <style:style style:name="P125" style:family="paragraph" style:parent-style-name="Text_20_body" style:list-style-name="L60"/>
    <style:style style:name="P126" style:family="paragraph" style:parent-style-name="Text_20_body" style:list-style-name="L61">
      <style:paragraph-properties fo:margin-top="0cm" fo:margin-bottom="0cm" style:contextual-spacing="false"/>
    </style:style>
    <style:style style:name="P127" style:family="paragraph" style:parent-style-name="Text_20_body" style:list-style-name="L61"/>
    <style:style style:name="P128" style:family="paragraph" style:parent-style-name="Text_20_body" style:list-style-name="L62">
      <style:paragraph-properties fo:margin-top="0cm" fo:margin-bottom="0cm" style:contextual-spacing="false"/>
    </style:style>
    <style:style style:name="P129" style:family="paragraph" style:parent-style-name="Text_20_body" style:list-style-name="L62"/>
    <style:style style:name="P130" style:family="paragraph" style:parent-style-name="Text_20_body" style:list-style-name="L63">
      <style:paragraph-properties fo:margin-top="0cm" fo:margin-bottom="0cm" style:contextual-spacing="false"/>
    </style:style>
    <style:style style:name="P131" style:family="paragraph" style:parent-style-name="Text_20_body" style:list-style-name="L63"/>
    <style:style style:name="P132" style:family="paragraph" style:parent-style-name="Text_20_body" style:list-style-name="L64">
      <style:paragraph-properties fo:margin-top="0cm" fo:margin-bottom="0cm" style:contextual-spacing="false"/>
    </style:style>
    <style:style style:name="P133" style:family="paragraph" style:parent-style-name="Text_20_body" style:list-style-name="L64"/>
    <style:style style:name="P134" style:family="paragraph" style:parent-style-name="Text_20_body" style:list-style-name="L65">
      <style:paragraph-properties fo:margin-top="0cm" fo:margin-bottom="0cm" style:contextual-spacing="false"/>
    </style:style>
    <style:style style:name="P135" style:family="paragraph" style:parent-style-name="Text_20_body" style:list-style-name="L65"/>
    <style:style style:name="P136" style:family="paragraph" style:parent-style-name="Text_20_body" style:list-style-name="L66">
      <style:paragraph-properties fo:margin-top="0cm" fo:margin-bottom="0cm" style:contextual-spacing="false"/>
    </style:style>
    <style:style style:name="P137" style:family="paragraph" style:parent-style-name="Text_20_body" style:list-style-name="L66"/>
    <style:style style:name="P138" style:family="paragraph" style:parent-style-name="Text_20_body" style:list-style-name="L67">
      <style:paragraph-properties fo:margin-top="0cm" fo:margin-bottom="0cm" style:contextual-spacing="false"/>
    </style:style>
    <style:style style:name="P139" style:family="paragraph" style:parent-style-name="Text_20_body" style:list-style-name="L67"/>
    <style:style style:name="P140" style:family="paragraph" style:parent-style-name="Text_20_body" style:list-style-name="L68">
      <style:paragraph-properties fo:margin-top="0cm" fo:margin-bottom="0cm" style:contextual-spacing="false"/>
    </style:style>
    <style:style style:name="P141" style:family="paragraph" style:parent-style-name="Text_20_body" style:list-style-name="L68"/>
    <style:style style:name="P142" style:family="paragraph" style:parent-style-name="Text_20_body" style:list-style-name="L69">
      <style:paragraph-properties fo:margin-top="0cm" fo:margin-bottom="0cm" style:contextual-spacing="false"/>
    </style:style>
    <style:style style:name="P143" style:family="paragraph" style:parent-style-name="Text_20_body" style:list-style-name="L69"/>
    <style:style style:name="P144" style:family="paragraph" style:parent-style-name="Text_20_body" style:list-style-name="L70"/>
    <style:style style:name="P145" style:family="paragraph" style:parent-style-name="Text_20_body" style:list-style-name="L71"/>
    <style:style style:name="P146" style:family="paragraph" style:parent-style-name="Text_20_body" style:list-style-name="L72"/>
    <style:style style:name="P147" style:family="paragraph" style:parent-style-name="Text_20_body" style:list-style-name="L73"/>
    <style:style style:name="P148" style:family="paragraph" style:parent-style-name="Text_20_body" style:list-style-name="L74"/>
    <style:style style:name="P149" style:family="paragraph" style:parent-style-name="Text_20_body" style:list-style-name="L75"/>
    <style:style style:name="P150" style:family="paragraph" style:parent-style-name="Text_20_body" style:list-style-name="L76"/>
    <style:style style:name="P151" style:family="paragraph" style:parent-style-name="Text_20_body" style:list-style-name="L77"/>
    <style:style style:name="P152" style:family="paragraph" style:parent-style-name="Text_20_body" style:list-style-name="L78"/>
    <style:style style:name="P153" style:family="paragraph" style:parent-style-name="Quotations">
      <style:paragraph-properties fo:margin-left="0cm" fo:margin-top="0cm" fo:margin-bottom="0.247cm" style:contextual-spacing="false" fo:line-height="115%" fo:text-indent="0cm" style:auto-text-indent="false"/>
    </style:style>
    <style:style style:name="P154" style:family="paragraph" style:parent-style-name="Text_20_body" style:list-style-name="L79">
      <style:paragraph-properties fo:margin-top="0cm" fo:margin-bottom="0cm" style:contextual-spacing="false"/>
    </style:style>
    <style:style style:name="P155" style:family="paragraph" style:parent-style-name="Text_20_body" style:list-style-name="L79"/>
    <style:style style:name="P156" style:family="paragraph" style:parent-style-name="Text_20_body" style:list-style-name="L80">
      <style:paragraph-properties fo:margin-top="0cm" fo:margin-bottom="0cm" style:contextual-spacing="false"/>
    </style:style>
    <style:style style:name="P157" style:family="paragraph" style:parent-style-name="Text_20_body" style:list-style-name="L80"/>
    <style:style style:name="P158" style:family="paragraph" style:parent-style-name="Text_20_body" style:list-style-name="L81">
      <style:paragraph-properties fo:margin-top="0cm" fo:margin-bottom="0cm" style:contextual-spacing="false"/>
    </style:style>
    <style:style style:name="P159" style:family="paragraph" style:parent-style-name="Text_20_body" style:list-style-name="L81"/>
    <style:style style:name="P160" style:family="paragraph" style:parent-style-name="Text_20_body" style:list-style-name="L82">
      <style:paragraph-properties fo:margin-top="0cm" fo:margin-bottom="0cm" style:contextual-spacing="false"/>
    </style:style>
    <style:style style:name="P161" style:family="paragraph" style:parent-style-name="Text_20_body" style:list-style-name="L82"/>
    <style:style style:name="P162" style:family="paragraph" style:parent-style-name="Text_20_body" style:list-style-name="L83">
      <style:paragraph-properties fo:margin-top="0cm" fo:margin-bottom="0cm" style:contextual-spacing="false"/>
    </style:style>
    <style:style style:name="P163" style:family="paragraph" style:parent-style-name="Text_20_body" style:list-style-name="L83"/>
    <style:style style:name="P164" style:family="paragraph" style:parent-style-name="Text_20_body" style:list-style-name="L84">
      <style:paragraph-properties fo:margin-top="0cm" fo:margin-bottom="0cm" style:contextual-spacing="false"/>
    </style:style>
    <style:style style:name="P165" style:family="paragraph" style:parent-style-name="Text_20_body" style:list-style-name="L84"/>
    <style:style style:name="P166" style:family="paragraph" style:parent-style-name="Text_20_body" style:list-style-name="L85">
      <style:paragraph-properties fo:margin-top="0cm" fo:margin-bottom="0cm" style:contextual-spacing="false"/>
    </style:style>
    <style:style style:name="P167" style:family="paragraph" style:parent-style-name="Text_20_body" style:list-style-name="L85"/>
    <style:style style:name="P168" style:family="paragraph" style:parent-style-name="Text_20_body" style:list-style-name="L86">
      <style:paragraph-properties fo:margin-top="0cm" fo:margin-bottom="0cm" style:contextual-spacing="false"/>
    </style:style>
    <style:style style:name="P169" style:family="paragraph" style:parent-style-name="Text_20_body" style:list-style-name="L86"/>
    <style:style style:name="P170" style:family="paragraph" style:parent-style-name="Text_20_body" style:list-style-name="L87">
      <style:paragraph-properties fo:margin-top="0cm" fo:margin-bottom="0cm" style:contextual-spacing="false"/>
    </style:style>
    <style:style style:name="P171" style:family="paragraph" style:parent-style-name="Text_20_body" style:list-style-name="L87"/>
    <style:style style:name="P172" style:family="paragraph" style:parent-style-name="Text_20_body" style:list-style-name="L88">
      <style:paragraph-properties fo:margin-top="0cm" fo:margin-bottom="0cm" style:contextual-spacing="false"/>
    </style:style>
    <style:style style:name="P173" style:family="paragraph" style:parent-style-name="Text_20_body" style:list-style-name="L88"/>
    <style:style style:name="P174" style:family="paragraph" style:parent-style-name="Quotations">
      <style:paragraph-properties fo:margin-top="0cm" fo:margin-bottom="0.247cm" style:contextual-spacing="false" fo:line-height="115%"/>
      <style:text-properties officeooo:paragraph-rsid="000d2633"/>
    </style:style>
    <style:style style:name="P175" style:family="paragraph" style:parent-style-name="Preformatted_20_Text">
      <style:paragraph-properties fo:margin-left="0cm" fo:margin-right="0cm" fo:margin-top="0cm" fo:margin-bottom="0.247cm" style:contextual-spacing="false" fo:line-height="115%" fo:text-indent="0cm" style:auto-text-indent="false"/>
      <style:text-properties fo:font-style="italic" fo:font-weight="normal" officeooo:paragraph-rsid="000d2633" style:font-style-asian="italic" style:font-weight-asian="normal" style:font-style-complex="italic" style:font-weight-complex="normal"/>
    </style:style>
    <style:style style:name="P176" style:family="paragraph" style:parent-style-name="Preformatted_20_Text">
      <style:paragraph-properties fo:line-height="115%"/>
      <style:text-properties officeooo:paragraph-rsid="000d2633"/>
    </style:style>
    <style:style style:name="P177" style:family="paragraph" style:parent-style-name="Text_20_body" style:list-style-name="L89">
      <style:paragraph-properties fo:margin-top="0cm" fo:margin-bottom="0cm" style:contextual-spacing="false"/>
    </style:style>
    <style:style style:name="P178" style:family="paragraph" style:parent-style-name="Text_20_body" style:list-style-name="L89"/>
    <style:style style:name="P179" style:family="paragraph" style:parent-style-name="Text_20_body" style:list-style-name="L90">
      <style:paragraph-properties fo:margin-top="0cm" fo:margin-bottom="0cm" style:contextual-spacing="false"/>
    </style:style>
    <style:style style:name="P180" style:family="paragraph" style:parent-style-name="Text_20_body" style:list-style-name="L90"/>
    <style:style style:name="P181" style:family="paragraph" style:parent-style-name="Text_20_body" style:list-style-name="L91">
      <style:paragraph-properties fo:margin-top="0cm" fo:margin-bottom="0cm" style:contextual-spacing="false"/>
    </style:style>
    <style:style style:name="P182" style:family="paragraph" style:parent-style-name="Text_20_body" style:list-style-name="L91"/>
    <style:style style:name="P183" style:family="paragraph" style:parent-style-name="Text_20_body" style:list-style-name="L92">
      <style:paragraph-properties fo:margin-top="0cm" fo:margin-bottom="0cm" style:contextual-spacing="false"/>
    </style:style>
    <style:style style:name="P184" style:family="paragraph" style:parent-style-name="Text_20_body" style:list-style-name="L92"/>
    <style:style style:name="P185" style:family="paragraph" style:parent-style-name="Text_20_body" style:list-style-name="L93">
      <style:paragraph-properties fo:margin-top="0cm" fo:margin-bottom="0cm" style:contextual-spacing="false"/>
    </style:style>
    <style:style style:name="P186" style:family="paragraph" style:parent-style-name="Text_20_body" style:list-style-name="L93"/>
    <style:style style:name="P187" style:family="paragraph" style:parent-style-name="Text_20_body" style:list-style-name="L94">
      <style:paragraph-properties fo:margin-top="0cm" fo:margin-bottom="0cm" style:contextual-spacing="false"/>
    </style:style>
    <style:style style:name="P188" style:family="paragraph" style:parent-style-name="Text_20_body" style:list-style-name="L94"/>
    <style:style style:name="P189" style:family="paragraph" style:parent-style-name="Text_20_body" style:list-style-name="L95"/>
    <style:style style:name="P190" style:family="paragraph" style:parent-style-name="Text_20_body" style:list-style-name="L96"/>
    <style:style style:name="P191" style:family="paragraph" style:parent-style-name="Text_20_body" style:list-style-name="L97"/>
    <style:style style:name="P192" style:family="paragraph" style:parent-style-name="Text_20_body" style:list-style-name="L98"/>
    <style:style style:name="P193" style:family="paragraph" style:parent-style-name="Text_20_body" style:list-style-name="L99"/>
    <style:style style:name="P194" style:family="paragraph" style:parent-style-name="Text_20_body" style:list-style-name="L100"/>
    <style:style style:name="P195" style:family="paragraph" style:parent-style-name="Text_20_body" style:list-style-name="L101"/>
    <style:style style:name="P196" style:family="paragraph" style:parent-style-name="Text_20_body" style:list-style-name="L102">
      <style:paragraph-properties fo:margin-top="0cm" fo:margin-bottom="0cm" style:contextual-spacing="false"/>
    </style:style>
    <style:style style:name="P197" style:family="paragraph" style:parent-style-name="Text_20_body" style:list-style-name="L102"/>
    <style:style style:name="P198" style:family="paragraph" style:parent-style-name="Text_20_body" style:list-style-name="L103">
      <style:paragraph-properties fo:margin-top="0cm" fo:margin-bottom="0cm" style:contextual-spacing="false"/>
    </style:style>
    <style:style style:name="P199" style:family="paragraph" style:parent-style-name="Text_20_body" style:list-style-name="L103"/>
    <style:style style:name="P200" style:family="paragraph" style:parent-style-name="Preformatted_20_Text" style:list-style-name="L103">
      <style:paragraph-properties fo:margin-left="0cm" fo:margin-right="0cm" fo:line-height="115%" fo:text-indent="0cm" style:auto-text-indent="false"/>
      <style:text-properties fo:font-style="italic" officeooo:paragraph-rsid="0011a820" style:font-style-asian="italic" style:font-style-complex="italic"/>
    </style:style>
    <style:style style:name="P201" style:family="paragraph" style:parent-style-name="Text_20_body" style:list-style-name="L104">
      <style:paragraph-properties fo:margin-top="0cm" fo:margin-bottom="0cm" style:contextual-spacing="false"/>
    </style:style>
    <style:style style:name="P202" style:family="paragraph" style:parent-style-name="Text_20_body" style:list-style-name="L104"/>
    <style:style style:name="P203" style:family="paragraph" style:parent-style-name="Heading_20_3">
      <style:paragraph-properties fo:margin-top="0cm" fo:margin-bottom="0.247cm" style:contextual-spacing="false" fo:line-height="115%"/>
      <style:text-properties officeooo:paragraph-rsid="0011a820"/>
    </style:style>
    <style:style style:name="P204" style:family="paragraph" style:parent-style-name="Text_20_body">
      <style:text-properties officeooo:paragraph-rsid="0011a820"/>
    </style:style>
    <style:style style:name="P205" style:family="paragraph" style:parent-style-name="Preformatted_20_Text">
      <style:paragraph-properties fo:margin-left="0cm" fo:margin-right="0cm" fo:line-height="115%" fo:text-indent="0cm" style:auto-text-indent="false"/>
      <style:text-properties fo:font-style="italic" officeooo:paragraph-rsid="0011a820" style:font-style-asian="italic" style:font-style-complex="italic"/>
    </style:style>
    <style:style style:name="P206" style:family="paragraph" style:parent-style-name="Text_20_body" style:list-style-name="L105">
      <style:paragraph-properties fo:margin-top="0cm" fo:margin-bottom="0cm" style:contextual-spacing="false"/>
    </style:style>
    <style:style style:name="P207" style:family="paragraph" style:parent-style-name="Text_20_body" style:list-style-name="L105"/>
    <style:style style:name="P208" style:family="paragraph" style:parent-style-name="Text_20_body" style:list-style-name="L106">
      <style:paragraph-properties fo:margin-top="0cm" fo:margin-bottom="0cm" style:contextual-spacing="false"/>
    </style:style>
    <style:style style:name="P209" style:family="paragraph" style:parent-style-name="Text_20_body" style:list-style-name="L106"/>
    <style:style style:name="P210" style:family="paragraph" style:parent-style-name="Text_20_body" style:list-style-name="L107">
      <style:paragraph-properties fo:margin-top="0cm" fo:margin-bottom="0cm" style:contextual-spacing="false"/>
    </style:style>
    <style:style style:name="P211" style:family="paragraph" style:parent-style-name="Text_20_body" style:list-style-name="L107"/>
    <style:style style:name="P212" style:family="paragraph" style:parent-style-name="Text_20_body" style:list-style-name="L108">
      <style:paragraph-properties fo:margin-top="0cm" fo:margin-bottom="0cm" style:contextual-spacing="false"/>
    </style:style>
    <style:style style:name="P213" style:family="paragraph" style:parent-style-name="Text_20_body" style:list-style-name="L108"/>
    <style:style style:name="P214" style:family="paragraph" style:parent-style-name="Text_20_body" style:list-style-name="L109">
      <style:paragraph-properties fo:margin-top="0cm" fo:margin-bottom="0cm" style:contextual-spacing="false"/>
    </style:style>
    <style:style style:name="P215" style:family="paragraph" style:parent-style-name="Text_20_body" style:list-style-name="L109"/>
    <style:style style:name="P216" style:family="paragraph" style:parent-style-name="Text_20_body" style:list-style-name="L110">
      <style:paragraph-properties fo:margin-top="0cm" fo:margin-bottom="0cm" style:contextual-spacing="false"/>
    </style:style>
    <style:style style:name="P217" style:family="paragraph" style:parent-style-name="Text_20_body" style:list-style-name="L110"/>
    <style:style style:name="P218" style:family="paragraph" style:parent-style-name="Text_20_body" style:list-style-name="L111">
      <style:paragraph-properties fo:margin-top="0cm" fo:margin-bottom="0cm" style:contextual-spacing="false"/>
    </style:style>
    <style:style style:name="P219" style:family="paragraph" style:parent-style-name="Text_20_body" style:list-style-name="L111"/>
    <style:style style:name="P220" style:family="paragraph" style:parent-style-name="Heading_20_1">
      <style:text-properties officeooo:paragraph-rsid="0014b6dc"/>
    </style:style>
    <style:style style:name="P221" style:family="paragraph" style:parent-style-name="Text_20_body" style:list-style-name="L112">
      <style:paragraph-properties fo:margin-top="0cm" fo:margin-bottom="0cm" style:contextual-spacing="false"/>
    </style:style>
    <style:style style:name="P222" style:family="paragraph" style:parent-style-name="Text_20_body" style:list-style-name="L112"/>
    <style:style style:name="P223" style:family="paragraph" style:parent-style-name="Text_20_body" style:list-style-name="L113">
      <style:paragraph-properties fo:margin-top="0cm" fo:margin-bottom="0cm" style:contextual-spacing="false"/>
    </style:style>
    <style:style style:name="P224" style:family="paragraph" style:parent-style-name="Text_20_body" style:list-style-name="L113"/>
    <style:style style:name="P225" style:family="paragraph" style:parent-style-name="Preformatted_20_Text">
      <style:paragraph-properties fo:margin-left="0cm" fo:margin-right="0cm" fo:line-height="115%" fo:text-indent="0cm" style:auto-text-indent="false"/>
      <style:text-properties officeooo:paragraph-rsid="00132ea7"/>
    </style:style>
    <style:style style:name="P226" style:family="paragraph" style:parent-style-name="Text_20_body" style:list-style-name="L114">
      <style:paragraph-properties fo:margin-top="0cm" fo:margin-bottom="0cm" style:contextual-spacing="false"/>
    </style:style>
    <style:style style:name="P227" style:family="paragraph" style:parent-style-name="Text_20_body" style:list-style-name="L114"/>
    <style:style style:name="P228" style:family="paragraph" style:parent-style-name="Text_20_body" style:list-style-name="L115">
      <style:paragraph-properties fo:margin-top="0cm" fo:margin-bottom="0cm" style:contextual-spacing="false"/>
    </style:style>
    <style:style style:name="P229" style:family="paragraph" style:parent-style-name="Text_20_body" style:list-style-name="L115"/>
    <style:style style:name="P230" style:family="paragraph" style:parent-style-name="Text_20_body" style:list-style-name="L116"/>
    <style:style style:name="P231" style:family="paragraph" style:parent-style-name="Text_20_body" style:list-style-name="L117"/>
    <style:style style:name="P232" style:family="paragraph" style:parent-style-name="Text_20_body" style:list-style-name="L118">
      <style:paragraph-properties fo:margin-top="0cm" fo:margin-bottom="0cm" style:contextual-spacing="false"/>
    </style:style>
    <style:style style:name="P233" style:family="paragraph" style:parent-style-name="Text_20_body" style:list-style-name="L118"/>
    <style:style style:name="P234" style:family="paragraph" style:parent-style-name="Text_20_body" style:list-style-name="L119">
      <style:paragraph-properties fo:margin-top="0cm" fo:margin-bottom="0cm" style:contextual-spacing="false"/>
    </style:style>
    <style:style style:name="P235" style:family="paragraph" style:parent-style-name="Text_20_body" style:list-style-name="L119"/>
    <style:style style:name="P236" style:family="paragraph" style:parent-style-name="Text_20_body" style:list-style-name="L120">
      <style:paragraph-properties fo:margin-top="0cm" fo:margin-bottom="0cm" style:contextual-spacing="false"/>
    </style:style>
    <style:style style:name="P237" style:family="paragraph" style:parent-style-name="Text_20_body" style:list-style-name="L120"/>
    <style:style style:name="P238" style:family="paragraph" style:parent-style-name="Table_20_Heading">
      <style:text-properties fo:font-size="2pt" style:font-size-asian="2pt" style:font-size-complex="2pt"/>
    </style:style>
    <style:style style:name="P239" style:family="paragraph" style:parent-style-name="Text_20_body" style:list-style-name="L121">
      <style:paragraph-properties fo:margin-top="0cm" fo:margin-bottom="0cm" style:contextual-spacing="false"/>
    </style:style>
    <style:style style:name="P240" style:family="paragraph" style:parent-style-name="Text_20_body" style:list-style-name="L121"/>
    <style:style style:name="P241" style:family="paragraph" style:parent-style-name="Text_20_body" style:list-style-name="L122">
      <style:paragraph-properties fo:margin-top="0cm" fo:margin-bottom="0cm" style:contextual-spacing="false"/>
    </style:style>
    <style:style style:name="P242" style:family="paragraph" style:parent-style-name="Text_20_body" style:list-style-name="L122"/>
    <style:style style:name="P243" style:family="paragraph" style:parent-style-name="Text_20_body" style:list-style-name="L123">
      <style:paragraph-properties fo:margin-top="0cm" fo:margin-bottom="0cm" style:contextual-spacing="false"/>
    </style:style>
    <style:style style:name="P244" style:family="paragraph" style:parent-style-name="Text_20_body" style:list-style-name="L123"/>
    <style:style style:name="P245" style:family="paragraph" style:parent-style-name="Text_20_body" style:list-style-name="L124">
      <style:paragraph-properties fo:margin-top="0cm" fo:margin-bottom="0cm" style:contextual-spacing="false"/>
    </style:style>
    <style:style style:name="P246" style:family="paragraph" style:parent-style-name="Text_20_body" style:list-style-name="L124"/>
    <style:style style:name="P247" style:family="paragraph" style:parent-style-name="Text_20_body" style:list-style-name="L125">
      <style:paragraph-properties fo:margin-top="0cm" fo:margin-bottom="0cm" style:contextual-spacing="false"/>
    </style:style>
    <style:style style:name="P248" style:family="paragraph" style:parent-style-name="Text_20_body" style:list-style-name="L125"/>
    <style:style style:name="P249" style:family="paragraph" style:parent-style-name="Text_20_body" style:list-style-name="L126">
      <style:paragraph-properties fo:margin-top="0cm" fo:margin-bottom="0cm" style:contextual-spacing="false"/>
    </style:style>
    <style:style style:name="P250" style:family="paragraph" style:parent-style-name="Text_20_body" style:list-style-name="L126"/>
    <style:style style:name="P251" style:family="paragraph" style:parent-style-name="Text_20_body" style:list-style-name="L127">
      <style:paragraph-properties fo:margin-top="0cm" fo:margin-bottom="0cm" style:contextual-spacing="false"/>
    </style:style>
    <style:style style:name="P252" style:family="paragraph" style:parent-style-name="Text_20_body" style:list-style-name="L127"/>
    <style:style style:name="P253" style:family="paragraph" style:parent-style-name="Heading_20_1">
      <style:text-properties officeooo:paragraph-rsid="001652e7"/>
    </style:style>
    <style:style style:name="P254" style:family="paragraph" style:parent-style-name="Heading_20_2">
      <style:text-properties officeooo:paragraph-rsid="001652e7"/>
    </style:style>
    <style:style style:name="P255" style:family="paragraph" style:parent-style-name="Text_20_body" style:list-style-name="L128">
      <style:paragraph-properties fo:margin-top="0cm" fo:margin-bottom="0cm" style:contextual-spacing="false"/>
    </style:style>
    <style:style style:name="P256" style:family="paragraph" style:parent-style-name="Text_20_body" style:list-style-name="L128"/>
    <style:style style:name="P257" style:family="paragraph" style:parent-style-name="Text_20_body" style:list-style-name="L129">
      <style:paragraph-properties fo:margin-top="0cm" fo:margin-bottom="0cm" style:contextual-spacing="false"/>
    </style:style>
    <style:style style:name="P258" style:family="paragraph" style:parent-style-name="Text_20_body" style:list-style-name="L129"/>
    <style:style style:name="P259" style:family="paragraph" style:parent-style-name="Text_20_body" style:list-style-name="L130">
      <style:paragraph-properties fo:margin-top="0cm" fo:margin-bottom="0cm" style:contextual-spacing="false"/>
    </style:style>
    <style:style style:name="P260" style:family="paragraph" style:parent-style-name="Text_20_body" style:list-style-name="L130"/>
    <style:style style:name="P261" style:family="paragraph" style:parent-style-name="Standard">
      <style:paragraph-properties fo:margin-top="0cm" fo:margin-bottom="0.247cm" style:contextual-spacing="false" fo:line-height="115%"/>
    </style:style>
    <style:style style:name="P262" style:family="paragraph" style:parent-style-name="Standard">
      <style:paragraph-properties fo:margin-left="0cm" fo:margin-right="0cm" style:line-height-at-least="0.503cm" fo:text-indent="0cm" style:auto-text-indent="false"/>
      <style:text-properties fo:color="#d4d4d4" loext:opacity="100%" fo:background-color="#111217"/>
    </style:style>
    <style:style style:name="P263" style:family="paragraph" style:parent-style-name="Standard">
      <style:paragraph-properties fo:margin-left="0cm" fo:margin-right="0cm" style:line-height-at-least="0.503cm" fo:text-indent="0cm" style:auto-text-indent="false"/>
      <style:text-properties fo:color="#d4d4d4" loext:opacity="100%" style:font-name="Roboto Mono" fo:font-size="10.5pt" fo:font-weight="normal" fo:background-color="#111217"/>
    </style:style>
    <style:style style:name="P264" style:family="paragraph" style:parent-style-name="Text_20_body" style:list-style-name="L131">
      <style:paragraph-properties fo:margin-top="0cm" fo:margin-bottom="0cm" style:contextual-spacing="false"/>
    </style:style>
    <style:style style:name="P265" style:family="paragraph" style:parent-style-name="Text_20_body" style:list-style-name="L131"/>
    <style:style style:name="P266" style:family="paragraph" style:parent-style-name="Text_20_body" style:list-style-name="L132">
      <style:paragraph-properties fo:margin-top="0cm" fo:margin-bottom="0cm" style:contextual-spacing="false"/>
    </style:style>
    <style:style style:name="P267" style:family="paragraph" style:parent-style-name="Text_20_body" style:list-style-name="L132"/>
    <style:style style:name="P268" style:family="paragraph" style:parent-style-name="Text_20_body" style:list-style-name="L133">
      <style:paragraph-properties fo:margin-top="0cm" fo:margin-bottom="0cm" style:contextual-spacing="false"/>
    </style:style>
    <style:style style:name="P269" style:family="paragraph" style:parent-style-name="Text_20_body" style:list-style-name="L133"/>
    <style:style style:name="P270" style:family="paragraph" style:parent-style-name="Standard">
      <style:paragraph-properties fo:margin-left="0cm" fo:margin-right="0cm" style:line-height-at-least="0.503cm" fo:text-indent="0cm" style:auto-text-indent="false"/>
      <style:text-properties fo:color="#569cd6" loext:opacity="100%" style:font-name="Roboto Mono" fo:font-size="10.5pt" fo:font-weight="normal" fo:background-color="#111217"/>
    </style:style>
    <style:style style:name="P271" style:family="paragraph" style:parent-style-name="Text_20_body" style:list-style-name="L134">
      <style:paragraph-properties fo:margin-top="0cm" fo:margin-bottom="0cm" style:contextual-spacing="false"/>
    </style:style>
    <style:style style:name="P272" style:family="paragraph" style:parent-style-name="Text_20_body" style:list-style-name="L134"/>
    <style:style style:name="P273" style:family="paragraph" style:parent-style-name="Standard">
      <style:paragraph-properties fo:margin-left="0cm" fo:margin-right="0cm" style:line-height-at-least="0.503cm" fo:text-indent="0cm" style:auto-text-indent="false"/>
      <style:text-properties fo:color="#d4d4d4" loext:opacity="100%" style:font-name="Roboto Mono" fo:font-size="10.5pt" fo:font-weight="normal" officeooo:paragraph-rsid="00167847" fo:background-color="#111217"/>
    </style:style>
    <style:style style:name="P274" style:family="paragraph" style:parent-style-name="Heading_20_2">
      <style:paragraph-properties fo:margin-top="0cm" fo:margin-bottom="0.247cm" style:contextual-spacing="false" fo:line-height="115%"/>
      <style:text-properties officeooo:paragraph-rsid="00167847"/>
    </style:style>
    <style:style style:name="P275" style:family="paragraph" style:parent-style-name="Text_20_body" style:list-style-name="L135">
      <style:paragraph-properties fo:margin-top="0cm" fo:margin-bottom="0cm" style:contextual-spacing="false"/>
    </style:style>
    <style:style style:name="P276" style:family="paragraph" style:parent-style-name="Text_20_body" style:list-style-name="L135"/>
    <style:style style:name="P277" style:family="paragraph" style:parent-style-name="Text_20_body" style:list-style-name="L136">
      <style:paragraph-properties fo:margin-top="0cm" fo:margin-bottom="0cm" style:contextual-spacing="false"/>
    </style:style>
    <style:style style:name="P278" style:family="paragraph" style:parent-style-name="Text_20_body" style:list-style-name="L136"/>
    <style:style style:name="P279" style:family="paragraph" style:parent-style-name="Text_20_body" style:list-style-name="L137">
      <style:paragraph-properties fo:margin-top="0cm" fo:margin-bottom="0cm" style:contextual-spacing="false"/>
    </style:style>
    <style:style style:name="P280" style:family="paragraph" style:parent-style-name="Text_20_body" style:list-style-name="L137"/>
    <style:style style:name="P281" style:family="paragraph" style:parent-style-name="Text_20_body" style:list-style-name="L138">
      <style:paragraph-properties fo:margin-top="0cm" fo:margin-bottom="0cm" style:contextual-spacing="false"/>
    </style:style>
    <style:style style:name="P282" style:family="paragraph" style:parent-style-name="Text_20_body" style:list-style-name="L138"/>
    <style:style style:name="P283" style:family="paragraph" style:parent-style-name="Text_20_body">
      <style:text-properties officeooo:paragraph-rsid="001652e7"/>
    </style:style>
    <style:style style:name="P284" style:family="paragraph" style:parent-style-name="Text_20_body" style:list-style-name="L139">
      <style:paragraph-properties fo:margin-top="0cm" fo:margin-bottom="0cm" style:contextual-spacing="false"/>
    </style:style>
    <style:style style:name="P285" style:family="paragraph" style:parent-style-name="Text_20_body" style:list-style-name="L139"/>
    <style:style style:name="P286" style:family="paragraph" style:parent-style-name="Text_20_body">
      <style:text-properties officeooo:paragraph-rsid="0013dd17"/>
    </style:style>
    <style:style style:name="P287" style:family="paragraph" style:parent-style-name="Text_20_body">
      <style:text-properties fo:font-style="italic" officeooo:paragraph-rsid="0013dd17" style:font-style-asian="italic" style:font-style-complex="italic"/>
    </style:style>
    <style:style style:name="P288" style:family="paragraph" style:parent-style-name="Text_20_body" style:list-style-name="L140">
      <style:paragraph-properties fo:margin-top="0cm" fo:margin-bottom="0cm" style:contextual-spacing="false"/>
    </style:style>
    <style:style style:name="P289" style:family="paragraph" style:parent-style-name="Text_20_body" style:list-style-name="L140"/>
    <style:style style:name="P290" style:family="paragraph" style:parent-style-name="Text_20_body" style:list-style-name="L141">
      <style:paragraph-properties fo:margin-top="0cm" fo:margin-bottom="0cm" style:contextual-spacing="false"/>
    </style:style>
    <style:style style:name="P291" style:family="paragraph" style:parent-style-name="Text_20_body" style:list-style-name="L141"/>
    <style:style style:name="P292" style:family="paragraph" style:parent-style-name="Text_20_body" style:list-style-name="L142">
      <style:paragraph-properties fo:margin-top="0cm" fo:margin-bottom="0cm" style:contextual-spacing="false"/>
    </style:style>
    <style:style style:name="P293" style:family="paragraph" style:parent-style-name="Text_20_body" style:list-style-name="L142"/>
    <style:style style:name="P294" style:family="paragraph" style:parent-style-name="Text_20_body" style:list-style-name="L143">
      <style:paragraph-properties fo:margin-top="0cm" fo:margin-bottom="0cm" style:contextual-spacing="false"/>
    </style:style>
    <style:style style:name="P295" style:family="paragraph" style:parent-style-name="Text_20_body" style:list-style-name="L143"/>
    <style:style style:name="P296" style:family="paragraph" style:parent-style-name="Text_20_body" style:list-style-name="L144">
      <style:paragraph-properties fo:margin-top="0cm" fo:margin-bottom="0cm" style:contextual-spacing="false"/>
    </style:style>
    <style:style style:name="P297" style:family="paragraph" style:parent-style-name="Text_20_body" style:list-style-name="L144"/>
    <style:style style:name="P298" style:family="paragraph" style:parent-style-name="Text_20_body" style:list-style-name="L145">
      <style:paragraph-properties fo:margin-top="0cm" fo:margin-bottom="0cm" style:contextual-spacing="false"/>
    </style:style>
    <style:style style:name="P299" style:family="paragraph" style:parent-style-name="Text_20_body" style:list-style-name="L145"/>
    <style:style style:name="P300" style:family="paragraph" style:parent-style-name="Text_20_body" style:list-style-name="L146">
      <style:paragraph-properties fo:margin-top="0cm" fo:margin-bottom="0cm" style:contextual-spacing="false"/>
    </style:style>
    <style:style style:name="P301" style:family="paragraph" style:parent-style-name="Text_20_body" style:list-style-name="L146"/>
    <style:style style:name="T1" style:family="text">
      <style:text-properties officeooo:rsid="0016e214"/>
    </style:style>
    <style:style style:name="T2" style:family="text">
      <style:text-properties officeooo:rsid="000eeccc"/>
    </style:style>
    <style:style style:name="T3" style:family="text">
      <style:text-properties officeooo:rsid="000fea99"/>
    </style:style>
    <style:style style:name="T4" style:family="text">
      <style:text-properties officeooo:rsid="0011a820"/>
    </style:style>
    <style:style style:name="T5" style:family="text">
      <style:text-properties fo:font-weight="normal" officeooo:rsid="000fea99"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Liberation Serif"/>
    </style:style>
    <style:style style:name="T9" style:family="text">
      <style:text-properties officeooo:rsid="000b9f7d"/>
    </style:style>
    <style:style style:name="T10" style:family="text">
      <style:text-properties officeooo:rsid="000566e6"/>
    </style:style>
    <style:style style:name="T11" style:family="text">
      <style:text-properties officeooo:rsid="000747c1"/>
    </style:style>
    <style:style style:name="T12" style:family="text">
      <style:text-properties fo:font-style="italic" style:text-underline-style="none" style:font-style-asian="italic" style:font-style-complex="italic"/>
    </style:style>
    <style:style style:name="T13" style:family="text">
      <style:text-properties officeooo:rsid="0016cf6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0d2633"/>
    </style:style>
    <style:style style:name="T16" style:family="text">
      <style:text-properties fo:font-weight="bold" style:font-weight-asian="bold" style:font-weight-complex="bold"/>
    </style:style>
    <style:style style:name="T17" style:family="text">
      <style:text-properties fo:font-style="italic" officeooo:rsid="0011a820" style:font-style-asian="italic" style:font-style-complex="italic"/>
    </style:style>
    <style:style style:name="T18" style:family="text">
      <style:text-properties officeooo:rsid="0014b6dc"/>
    </style:style>
    <style:style style:name="T19" style:family="text">
      <style:text-properties fo:font-size="22pt" style:font-size-asian="22pt" style:font-size-complex="22pt"/>
    </style:style>
    <style:style style:name="T20" style:family="text">
      <style:text-properties officeooo:rsid="00132ea7"/>
    </style:style>
    <style:style style:name="T21" style:family="text">
      <style:text-properties officeooo:rsid="001652e7"/>
    </style:style>
    <style:style style:name="T22" style:family="text">
      <style:text-properties fo:color="#569cd6" loext:opacity="100%" style:font-name="Roboto Mono" fo:font-size="10.5pt" fo:font-weight="normal" fo:background-color="#111217" loext:char-shading-value="0"/>
    </style:style>
    <style:style style:name="T23" style:family="text">
      <style:text-properties fo:color="#ff00ff" loext:opacity="100%" style:font-name="Roboto Mono" fo:font-size="10.5pt" fo:font-weight="normal"/>
    </style:style>
    <style:style style:name="T24" style:family="text">
      <style:text-properties fo:color="#dcdcdc" loext:opacity="100%" style:font-name="Roboto Mono" fo:font-size="10.5pt" fo:font-weight="normal"/>
    </style:style>
    <style:style style:name="T25" style:family="text">
      <style:text-properties fo:color="#569cd6" loext:opacity="100%" style:font-name="Roboto Mono" fo:font-size="10.5pt" fo:font-weight="normal"/>
    </style:style>
    <style:style style:name="T26" style:family="text">
      <style:text-properties style:font-name="Roboto Mono" fo:font-size="10.5pt" fo:font-weight="normal"/>
    </style:style>
    <style:style style:name="T27" style:family="text">
      <style:text-properties fo:color="#569cd6" loext:opacity="100%"/>
    </style:style>
    <style:style style:name="T28" style:family="text">
      <style:text-properties fo:color="#778899" loext:opacity="100%"/>
    </style:style>
    <style:style style:name="T29" style:family="text">
      <style:text-properties fo:color="#dcdcdc" loext:opacity="100%"/>
    </style:style>
    <style:style style:name="T30" style:family="text">
      <style:text-properties fo:color="#b5cea8" loext:opacity="100%"/>
    </style:style>
    <style:style style:name="T31" style:family="text">
      <style:text-properties fo:color="#778899" loext:opacity="100%" style:font-name="Roboto Mono" fo:font-size="10.5pt" fo:font-weight="normal"/>
    </style:style>
    <style:style style:name="T32" style:family="text">
      <style:text-properties fo:color="#ff0000" loext:opacity="100%" style:font-name="Roboto Mono" fo:font-size="10.5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h>
      <text:h text:style-name="P1" text:outline-level="1"><draw:frame draw:style-name="fr1" draw:name="Imagen21" text:anchor-type="char" svg:width="17cm" svg:height="25.501cm" draw:z-index="20"><draw:image xlink:href="Pictures/10000001000004000000060080C9E24E.png" xlink:type="simple" xlink:show="embed" xlink:actuate="onLoad" draw:mime-type="image/png"/></draw:frame><text:soft-page-break/><text:span text:style-name="Strong_20_Emphasis"/></text:h>
      <text:h text:style-name="P1" text:outline-level="1"><text:soft-page-break/><text:span text:style-name="Strong_20_Emphasis">Fase A — Definición del problema</text:span></text:h>
      <text:h text:style-name="P2" text:outline-level="2"><text:span text:style-name="Strong_20_Emphasis">Tarea 1: Definición del Target</text:span></text:h>
      <text:h text:style-name="P3" text:outline-level="3"><text:span text:style-name="Strong_20_Emphasis">Planteamiento del problema</text:span></text:h>
      <text:p text:style-name="P4">El objetivo principal del proyecto es identificar y anticipar situaciones de <text:span text:style-name="Strong_20_Emphasis">derroche energético en el aula</text:span>, entendidas como aquellas en las que el sistema de climatización (calefacción o aire acondicionado) se encuentra en funcionamiento mientras existen aperturas significativas de puertas o ventanas.</text:p>
      <text:p text:style-name="P4">Este tipo de situaciones implica una pérdida de eficiencia energética, ya que el sistema de climatización trabaja de forma ineficiente al intercambiar continuamente aire con el exterior.</text:p>
      <text:p text:style-name="P4">Por tanto, el problema a resolver consiste en:</text:p>
      <text:p text:style-name="P5"><text:span text:style-name="Strong_20_Emphasis">Detectar y predecir situaciones de derroche energético a partir de los datos recogidos por los sensores del aula.</text:span></text:p>
      <text:h text:style-name="P3" text:outline-level="3"><text:span text:style-name="Strong_20_Emphasis">Definición del Target</text:span></text:h>
      <text:p text:style-name="P4">El target del modelo se ha definido como una variable binaria:</text:p>
      <text:list text:style-name="L1">
        <text:list-item>
          <text:p text:style-name="P6"><text:span text:style-name="Strong_20_Emphasis">Derroche = 1</text:span> → Existe una situación de derroche energético</text:p>
        </text:list-item>
        <text:list-item>
          <text:p text:style-name="P6"><text:span text:style-name="Strong_20_Emphasis">Derroche = 0</text:span> → No existe derroche energético</text:p>
        </text:list-item>
      </text:list>
      <text:p text:style-name="P4">Sin embargo, para poder definir esta variable de forma objetiva, ha sido necesario establecer previamente un criterio cuantificable que permita distinguir entre uso normal del aula y situaciones de pérdida energética.</text:p>
      <text:h text:style-name="P3" text:outline-level="3"><text:span text:style-name="Strong_20_Emphasis">Modelado de aperturas del aula</text:span></text:h>
      <text:p text:style-name="P4">Se ha modelado el aula en función de sus elementos de apertura, asignando un peso relativo a cada uno según su impacto en la pérdida energética <text:span text:style-name="T1">y teniendo en cuenta que el sensor 11 no funciona</text:span>:</text:p>
      <text:list text:style-name="L2">
        <text:list-item>
          <text:p text:style-name="P7">Ventanas pequeñas: <text:span text:style-name="Strong_20_Emphasis">1 unidad</text:span> (6 unidades en total)</text:p>
        </text:list-item>
        <text:list-item>
          <text:p text:style-name="P7">Ventanas grandes: <text:span text:style-name="Strong_20_Emphasis">2 unidades</text:span> (equivalente a dos ventanas pequeñas; 5 ventanas → 10 unidades)</text:p>
        </text:list-item>
        <text:list-item>
          <text:p text:style-name="P7">Puerta: <text:span text:style-name="T2">4</text:span><text:span text:style-name="Strong_20_Emphasis"> unidades</text:span> (equivalente a <text:span text:style-name="T2">cuatro</text:span> ventanas pequeñas)</text:p>
        </text:list-item>
      </text:list>
      <text:p text:style-name="P4">Esto da lugar a un total de:</text:p>
      <text:p text:style-name="P5"><text:span text:style-name="Strong_20_Emphasis"><text:span text:style-name="T2">20</text:span></text:span><text:span text:style-name="Strong_20_Emphasis"> unidades de apertura</text:span></text:p>
      <text:p text:style-name="P4">Considerando una hora completa (60 minutos), el máximo teórico de apertura es:</text:p>
      <text:p text:style-name="P5"><text:span text:style-name="Strong_20_Emphasis"><text:span text:style-name="T2">20</text:span></text:span><text:span text:style-name="Strong_20_Emphasis"> unidades × 60 minutos = 1</text:span><text:span text:style-name="Strong_20_Emphasis"><text:span text:style-name="T2">200</text:span></text:span><text:span text:style-name="Strong_20_Emphasis">0 unidades-minuto</text:span></text:p>
      <text:p text:style-name="P4">Este valor representa una situación extrema en la que todos los elementos permanecen abiertos durante toda la hora.</text:p>
      <text:h text:style-name="P2" text:outline-level="2"><text:soft-page-break/><text:span text:style-name="Strong_20_Emphasis">Definición del indicador de apertura</text:span></text:h>
      <text:p text:style-name="P4">A partir del modelo del aula, se define un indicador cuantitativo denominado:</text:p>
      <text:p text:style-name="P4"><text:span text:style-name="Strong_20_Emphasis">Unidades-minuto de apertura por hora</text:span></text:p>
      <text:p text:style-name="P4">Este indicador permite medir de forma acumulada el impacto de las aperturas durante cada hora, teniendo en cuenta simultáneamente:</text:p>
      <text:list text:style-name="L3">
        <text:list-item>
          <text:p text:style-name="P8">el número de elementos abiertos </text:p>
        </text:list-item>
        <text:list-item>
          <text:p text:style-name="P8">el peso relativo de cada uno (puerta, ventana grande o pequeña) </text:p>
        </text:list-item>
        <text:list-item>
          <text:p text:style-name="P9">el tiempo durante el cual permanecen abiertos </text:p>
        </text:list-item>
      </text:list>
      <text:p text:style-name="P4">De este modo, no todas las aperturas tienen el mismo impacto, reflejando de forma más realista la pérdida energética asociada a cada situación.</text:p>
      <text:h text:style-name="P10" text:outline-level="2"/>
      <text:h text:style-name="P10" text:outline-level="2">Diferenciación entre uso normal y derroche</text:h>
      <text:p text:style-name="P4"><text:span text:style-name="T3">En un principio se buscó plantear escenarios realistas p</text:span>ara establecer el umbral de derroche, <text:span text:style-name="T3">y </text:span>se realizó una diferenciación entre situaciones habituales de uso del aula y situaciones anómalas.</text:p>
      <text:h text:style-name="P11" text:outline-level="3">Uso normal del aula</text:h>
      <text:p text:style-name="P4">En un entorno real existen aperturas inevitables incluso cuando la climatización está en funcionamiento:</text:p>
      <text:list text:style-name="L4">
        <text:list-item>
          <text:p text:style-name="P12"><text:span text:style-name="Strong_20_Emphasis">Tránsito en la puerta</text:span><text:line-break/>Entradas y salidas de alumnos o profesores.<text:line-break/>Si la puerta (<text:span text:style-name="T4">4</text:span> unidades) se abre 10 veces durante <text:span text:style-name="T4">3</text:span>0 segundos, se acumulan aproximadamente 5 minutos:</text:p>
          <text:p text:style-name="P13"/>
        </text:list-item>
        <text:list-item>
          <text:p text:style-name="P12"><text:span text:style-name="Strong_20_Emphasis">Ventilación puntual</text:span><text:line-break/>Apertura de ventanas durante unos minutos para renovar el aire.<text:line-break/>Por ejemplo, abrir 2 ventanas grandes y 2 pequeñas (6 unidades) durante 5 minutos:</text:p>
          <text:p text:style-name="P12">6×5=30 unidades-minuto</text:p>
        </text:list-item>
      </text:list>
      <text:p text:style-name="P4">Por tanto, valores en torno a <text:span text:style-name="Strong_20_Emphasis">15–30 unidades-minuto</text:span> se consideran compatibles con un uso normal del aula y no deben ser penalizados como derroche.</text:p>
      <text:h text:style-name="P11" text:outline-level="3"/>
      <text:h text:style-name="P11" text:outline-level="3">Situaciones de derroche</text:h>
      <text:p text:style-name="P4">El derroche energético se produce cuando las aperturas dejan de ser puntuales y pasan a ser prolongadas o intensivas:</text:p>
      <text:list text:style-name="L5">
        <text:list-item>
          <text:p text:style-name="P14"><text:span text:style-name="Strong_20_Emphasis">Ventana olvidada abierta</text:span><text:line-break/>Una ventana pequeña (1 unidad) abierta durante toda la hora:</text:p>
          <text:p text:style-name="P15">1×60=60 unidades-minuto1</text:p>
        </text:list-item>
        <text:list-item>
          <text:p text:style-name="P14"><text:soft-page-break/><text:span text:style-name="Strong_20_Emphasis">Puerta mantenida abierta</text:span><text:line-break/>Una puerta (<text:span text:style-name="T4">4</text:span> unidades) abierta durante <text:span text:style-name="T4">15</text:span> minutos:</text:p>
          <text:p text:style-name="P15"><text:span text:style-name="T4">4</text:span>×<text:span text:style-name="T4">15</text:span>=60 unidades-minuto</text:p>
        </text:list-item>
        <text:list-item>
          <text:p text:style-name="P14"><text:span text:style-name="Strong_20_Emphasis">Apertura simultánea de múltiples elementos</text:span><text:line-break/>Varias ventanas abiertas durante un periodo relevante:</text:p>
          <text:p text:style-name="P14">10×15=150 unidades-minuto</text:p>
        </text:list-item>
      </text:list>
      <text:p text:style-name="P4">Estas situaciones implican una pérdida energética significativa, ya que el sistema de climatización funciona de forma ineficiente durante un tiempo prolongado.</text:p>
      <text:h text:style-name="P10" text:outline-level="2"/>
      <text:h text:style-name="P10" text:outline-level="2">Revisión del umbral de derroche</text:h>
      <text:p text:style-name="P4"><text:span text:style-name="T3">Por los cálculos planteados inicialmente se determinó marcar el derroche en torno al 5%. </text:span>Sin embargo, durante el análisis del modelo se detectó que este valor resultaba demasiado permisivo, ya que <text:span text:style-name="T3">toleraba</text:span> situaciones claramente ineficientes sin ser clasificadas como derroche.</text:p>
      <text:p text:style-name="P4">Por ejemplo:</text:p>
      <text:list text:style-name="L6">
        <text:list-item>
          <text:p text:style-name="P16"><text:span text:style-name="T3">U</text:span>na ventana pequeña abierta durante 59 minutos <text:s/>no sería considerada derroche, a pesar de tratarse de una situación claramente ineficiente.</text:p>
        </text:list-item>
      </text:list>
      <text:h text:style-name="P10" text:outline-level="2"/>
      <text:h text:style-name="P10" text:outline-level="2">Umbral de derroche definitivo</text:h>
      <text:p text:style-name="P4">A partir de esta observación, se decidió ajustar el umbral a un valor más restrictivo: 20 unidades-minuto.</text:p>
      <text:p text:style-name="P4">Este nuevo umbral permite:</text:p>
      <text:list text:style-name="L7">
        <text:list-item>
          <text:p text:style-name="P17">detectar aperturas prolongadas individuales </text:p>
        </text:list-item>
        <text:list-item>
          <text:p text:style-name="P17">detectar combinaciones de aperturas simultáneas </text:p>
        </text:list-item>
        <text:list-item>
          <text:p text:style-name="P18">evitar clasificar como derroche las aperturas puntuales propias del uso normal </text:p>
        </text:list-item>
      </text:list>
      <text:h text:style-name="P10" text:outline-level="2"/>
      <text:h text:style-name="P10" text:outline-level="2">Interpretación del nuevo umbral</text:h>
      <text:p text:style-name="P4">Con este criterio, se consideran situaciones de derroche:</text:p>
      <text:list text:style-name="L8">
        <text:list-item>
          <text:p text:style-name="P19">una ventana pequeña abierta durante 20 minutos </text:p>
        </text:list-item>
        <text:list-item>
          <text:p text:style-name="P19">una puerta abierta durante aproximadamente <text:span text:style-name="T4">6 </text:span>minutos </text:p>
        </text:list-item>
        <text:list-item>
          <text:p text:style-name="P20">dos ventanas grandes abiertas durante 5 minutos </text:p>
        </text:list-item>
      </text:list>
      <text:p text:style-name="P4">Este enfoque mantiene la coherencia del modelo ponderado, pero mejora su capacidad para detectar situaciones reales de pérdida energética.</text:p>
      <text:h text:style-name="P10" text:outline-level="2"><text:soft-page-break/>Conclusión</text:h>
      <text:p text:style-name="P4">El uso de unidades-minuto permite modelar de forma realista el impacto de las aperturas en el consumo energético del aula.</text:p>
      <text:p text:style-name="P4">El ajuste del umbral a 20 unidades-minuto corrige las limitaciones detectadas en la primera aproximación, proporcionando un criterio más equilibrado entre:</text:p>
      <text:list text:style-name="L9">
        <text:list-item>
          <text:p text:style-name="P21">sensibilidad (detección de derroche real) </text:p>
        </text:list-item>
        <text:list-item>
          <text:p text:style-name="P22">robustez (evitar falsos positivos) </text:p>
        </text:list-item>
      </text:list>
      <text:p text:style-name="P4">Este valor se utilizará en las fases posteriores para la construcción de la variable objetivo del modelo de predicción.</text:p>
      <text:h text:style-name="P3" text:outline-level="3"><text:span text:style-name="Strong_20_Emphasis">Definición del problema de predicción</text:span></text:h>
      <text:p text:style-name="P4">El problema se plantea como un problema de <text:span text:style-name="Strong_20_Emphasis">clasificación binaria supervisada</text:span>, donde el modelo debe predecir una variable categórica (derroche sí/no) a partir de variables de entrada (sensores) </text:p>
      <text:p text:style-name="P4">Por tanto, el problema se formula como:</text:p>
      <text:p text:style-name="P5"><text:span text:style-name="Strong_20_Emphasis"><text:span text:style-name="T5">·</text:span></text:span><text:span text:style-name="Strong_20_Emphasis"><text:span text:style-name="T6">Dado el estado de los sensores en una hora determinada, predecir si en la siguiente hora se producirá una situación de derroche energético.</text:span></text:span></text:p>
      <text:p text:style-name="P4">De este modo, el target final utilizado en el modelo será:</text:p>
      <text:list text:style-name="L10">
        <text:list-header>
          <text:p text:style-name="P23"><text:span text:style-name="Strong_20_Emphasis"><text:span text:style-name="T5">·</text:span></text:span><text:span text:style-name="Strong_20_Emphasis"><text:span text:style-name="T6">Derroche en la siguiente hora = 1 / 0</text:span></text:span></text:p>
        </text:list-header>
      </text:list>
      <text:p text:style-name="P4">Este enfoque permite no solo analizar el comportamiento pasado, sino también implementar sistemas de alerta temprana que contribuyan a mejorar la eficiencia energética del aula.</text:p>
      <text:p text:style-name="P4"/>
      <text:p text:style-name="P4"/>
      <text:p text:style-name="P4"/>
      <text:p text:style-name="P4"/>
      <text:p text:style-name="P4"/>
      <text:p text:style-name="P4"/>
      <text:p text:style-name="P4"/>
      <text:p text:style-name="P4"/>
      <text:p text:style-name="P4"/>
      <text:p text:style-name="P4"/>
      <text:h text:style-name="P24" text:outline-level="1"><text:soft-page-break/><text:span text:style-name="Strong_20_Emphasis">Fase B — Recopilación y preparación de datos</text:span></text:h>
      <text:h text:style-name="P10" text:outline-level="2"><text:span text:style-name="Strong_20_Emphasis">1. Origen y extracción de los datos</text:span></text:h>
      <text:p text:style-name="P4">Los datos utilizados en el proyecto proceden de un volcado histórico generado por el sistema domótico <text:span text:style-name="Strong_20_Emphasis">Home Assistant</text:span>, almacenado originalmente en una base de datos PostgreSQL <text:span text:style-name="T7">(TimescaleDB).</text:span></text:p>
      <text:p text:style-name="P4">Para poder trabajar con estos datos en un entorno analítico, se realizó un proceso de restauración del volcado SQL en una base de datos PostgreSQL temporal, creando la tabla <text:span text:style-name="Source_20_Text">ltss</text:span> con la siguiente estructura:</text:p>
      <text:list text:style-name="L11">
        <text:list-item>
          <text:p text:style-name="P25"><text:span text:style-name="Source_20_Text"><text:span text:style-name="T7">time</text:span></text:span><text:span text:style-name="T7">: marca temporal de la medida</text:span></text:p>
        </text:list-item>
        <text:list-item>
          <text:p text:style-name="P25"><text:span text:style-name="Source_20_Text"><text:span text:style-name="T7">entity_id</text:span></text:span><text:span text:style-name="T7">: identificador del sensor</text:span></text:p>
        </text:list-item>
        <text:list-item>
          <text:p text:style-name="P25"><text:span text:style-name="Source_20_Text"><text:span text:style-name="T7">state</text:span></text:span><text:span text:style-name="T7">: valor registrado</text:span></text:p>
        </text:list-item>
        <text:list-item>
          <text:p text:style-name="P25"><text:span text:style-name="Source_20_Text"><text:span text:style-name="T7">attributes</text:span></text:span><text:span text:style-name="T7">: metadatos en formato JSON</text:span></text:p>
        </text:list-item>
      </text:list>
      <text:p text:style-name="P4">Posteriormente, se exportó el contenido de dicha tabla a un archivo CSV mediante el comando <text:span text:style-name="Source_20_Text">\copy</text:span>, generando un dataset estructurado que representa el histórico bruto de sensores.</text:p>
      <text:p text:style-name="P4"/>
      <text:p text:style-name="P26">Write-Host "--- Iniciando proceso de exportación ---" -ForegroundColor Cyan # Crear base de datos (silenciamos el error si ya existe) &amp; $psqlPath -U postgres -c "CREATE DATABASE proyecto;" 2&gt;$null # Crear tabla &amp; $psqlPath -U postgres -d proyecto -c "CREATE TABLE IF NOT EXISTS ltss (time TIMESTAMP, entity_id TEXT, state TEXT, attributes JSONB);" # Importar SQL Write-Host "Cargando datos desde SQL... (esto puede tardar)" -ForegroundColor Yellow &amp; $psqlPath -U postgres -d proyecto -f $sqlFile &gt;$null # Exportar a CSV Write-Host "Generando archivo CSV..." -ForegroundColor Yellow &amp; $psqlPath -U postgres -d proyecto -c "\copy ltss TO '$csvFile' WITH CSV HEADER" </text:p>
      <text:p text:style-name="P4"/>
      <text:h text:style-name="P10" text:outline-level="2"><text:span text:style-name="Strong_20_Emphasis">2. Entorno de trabajo</text:span></text:h>
      <text:p text:style-name="P4">Aunque el origen de los datos se encuentra en PostgreSQL, se decidió realizar el procesamiento principal en <text:span text:style-name="Strong_20_Emphasis">Google Colab</text:span>, utilizando librerías de análisis de datos como <text:span text:style-name="Source_20_Text"><text:span text:style-name="T8">pandas</text:span></text:span><text:span text:style-name="T8"> y </text:span><text:span text:style-name="Source_20_Text"><text:span text:style-name="T8">numpy</text:span></text:span>.</text:p>
      <text:p text:style-name="P4">Esta decisión se fundamenta en que el objetivo del proyecto no es la gestión transaccional de datos, sino su transformación, análisis y uso en modelos de Machine Learning e Inteligencia Artificial.</text:p>
      <text:p text:style-name="P4">El uso de Colab permite:</text:p>
      <text:list text:style-name="L12">
        <text:list-item>
          <text:p text:style-name="P27">mayor flexibilidad en la manipulación de datos</text:p>
        </text:list-item>
        <text:list-item>
          <text:p text:style-name="P27">integración directa con librerías de análisis y modelado</text:p>
        </text:list-item>
        <text:list-item>
          <text:p text:style-name="P27">iteración rápida en procesos de limpieza y transformación</text:p>
        </text:list-item>
      </text:list>
      <text:p text:style-name="P4">De este modo, PostgreSQL se utilizó como sistema de ingestión, mientras que Colab se empleó como entorno principal de procesamiento.</text:p>
      <text:h text:style-name="P28" text:outline-level="1"><text:soft-page-break/><text:span text:style-name="Strong_20_Emphasis">Carga inicial y limpieza básica de datos</text:span></text:h>
      <text:h text:style-name="P29" text:outline-level="2"><text:span text:style-name="Strong_20_Emphasis">1. Objetivo de la fase</text:span></text:h>
      <text:p text:style-name="Text_20_body">En esta primera etapa se realiza la carga de los datos en el entorno de trabajo y una limpieza inicial orientada a garantizar la integridad del dataset antes de aplicar transformaciones más avanzadas.</text:p>
      <text:p text:style-name="Text_20_body">El objetivo es disponer de estructuras de datos consistentes sobre las que construir el proceso de agregación, análisis y modelado posterior.</text:p>
      <text:h text:style-name="P29" text:outline-level="2"><text:span text:style-name="Strong_20_Emphasis"/></text:h>
      <text:h text:style-name="P29" text:outline-level="2"><text:span text:style-name="Strong_20_Emphasis">2. Origen de los datos cargados</text:span></text:h>
      <text:p text:style-name="Text_20_body">Se utilizan dos fuentes principales de datos:</text:p>
      <text:list text:style-name="L13">
        <text:list-item>
          <text:p text:style-name="P30"><text:span text:style-name="Strong_20_Emphasis"><text:span text:style-name="Source_20_Text"><text:span text:style-name="T7">resultado_final.csv</text:span></text:span></text:span><text:line-break/>Contiene el histórico principal de sensores procedente del sistema domótico (Home Assistant), previamente exportado desde PostgreSQL.</text:p>
        </text:list-item>
        <text:list-item>
          <text:p text:style-name="P30"><text:span text:style-name="Strong_20_Emphasis"><text:span text:style-name="Source_20_Text"><text:span text:style-name="T7">History_...csv</text:span></text:span></text:span><text:line-break/>Dataset complementario con información adicional del aula (principalmente temperatura del aula 2), que será utilizado posteriormente para enriquecer el análisis.</text:p>
        </text:list-item>
      </text:list>
      <text:h text:style-name="P29" text:outline-level="2"><text:span text:style-name="Strong_20_Emphasis"/></text:h>
      <text:h text:style-name="P29" text:outline-level="2"><text:span text:style-name="Strong_20_Emphasis">3. Carga de datos en el entorno de trabajo</text:span></text:h>
      <text:p text:style-name="Text_20_body">Los datos se cargan en Google Colab mediante la librería <text:span text:style-name="Source_20_Text">pandas</text:span>, utilizando la función <text:span text:style-name="Source_20_Text"><text:span text:style-name="T7">read_csv</text:span></text:span><text:span text:style-name="T7">.</text:span></text:p>
      <text:p text:style-name="Text_20_body">Durante la carga se aplican las siguientes configuraciones:</text:p>
      <text:list text:style-name="L14">
        <text:list-item>
          <text:p text:style-name="P31"><text:span text:style-name="Source_20_Text"><text:span text:style-name="T7">low_memory=False</text:span></text:span><text:line-break/>Permite una inferencia de tipos más precisa en datasets grandes, evitando inconsistencias entre fragmentos del archivo.</text:p>
        </text:list-item>
        <text:list-item>
          <text:p text:style-name="P31"><text:span text:style-name="Source_20_Text"><text:span text:style-name="T7">skiprows=[101383]</text:span></text:span><text:line-break/>Se omite una fila específica previamente identificada como corrupta, evitando errores en la lectura del fichero.</text:p>
        </text:list-item>
        <text:list-item>
          <text:p text:style-name="P31"><text:span text:style-name="Source_20_Text"><text:span text:style-name="T7">on_bad_lines='warn'</text:span></text:span><text:line-break/>Permite continuar la carga incluso si existen líneas mal formateadas, generando únicamente un aviso en lugar de interrumpir la ejecución.</text:p>
        </text:list-item>
      </text:list>
      <text:p text:style-name="Text_20_body">Este enfoque prioriza la robustez del proceso de carga frente a posibles imperfecciones en los datos de origen.</text:p>
      <text:p text:style-name="Text_20_body"/>
      <text:h text:style-name="P29" text:outline-level="2"><text:soft-page-break/><text:span text:style-name="Strong_20_Emphasis">4. Limpieza estructural inicial</text:span></text:h>
      <text:p text:style-name="Text_20_body">Una vez cargados los datos, se realiza una normalización básica de la estructura:</text:p>
      <text:list text:style-name="L15">
        <text:list-item>
          <text:p text:style-name="P32">Eliminación de espacios en los nombres de columnas mediante:</text:p>
          <text:p text:style-name="P33"><text:span text:style-name="Source_20_Text"><text:span text:style-name="T7">df.columns = [c.strip() for c in df.columns]</text:span></text:span></text:p>
        </text:list-item>
      </text:list>
      <text:p text:style-name="Text_20_body">Esto evita problemas posteriores en el acceso a columnas debido a inconsistencias en los nombres.</text:p>
      <text:h text:style-name="P29" text:outline-level="2"><text:span text:style-name="Strong_20_Emphasis">5. Conversión de tipos de datos</text:span></text:h>
      <text:p text:style-name="Text_20_body">Se realiza una transformación de variables clave para garantizar su correcta interpretación:</text:p>
      <text:list text:style-name="L16">
        <text:list-item>
          <text:p text:style-name="P34"><text:span text:style-name="Strong_20_Emphasis">Variable temporal (</text:span><text:span text:style-name="Strong_20_Emphasis"><text:span text:style-name="Source_20_Text">time</text:span></text:span><text:span text:style-name="Strong_20_Emphasis">)</text:span><text:line-break/>Se convierte a formato datetime mediante:</text:p>
          <text:p text:style-name="P35"><text:span text:style-name="Source_20_Text"><text:span text:style-name="T7">pd.to_datetime(..., errors='coerce', format='mixed')</text:span></text:span></text:p>
          <text:list>
            <text:list-item>
              <text:p text:style-name="P34"><text:span text:style-name="Source_20_Text"><text:span text:style-name="T7">errors='coerce'</text:span></text:span> permite convertir valores inválidos en <text:span text:style-name="Source_20_Text">NaT</text:span>, facilitando su posterior eliminación.</text:p>
            </text:list-item>
            <text:list-item>
              <text:p text:style-name="P34"><text:span text:style-name="Source_20_Text"><text:span text:style-name="T7">format='mixed'</text:span></text:span> permite manejar distintos formatos de fecha en el dataset.</text:p>
            </text:list-item>
          </text:list>
        </text:list-item>
        <text:list-item>
          <text:p text:style-name="P34"><text:span text:style-name="Strong_20_Emphasis">Variable de estado (</text:span><text:span text:style-name="Strong_20_Emphasis"><text:span text:style-name="Source_20_Text">state</text:span></text:span><text:span text:style-name="Strong_20_Emphasis">)</text:span><text:line-break/>Se convierte a formato numérico:</text:p>
          <text:p text:style-name="P35"><text:span text:style-name="Source_20_Text"><text:span text:style-name="T7">pd.to_numeric(..., errors='coerce')</text:span></text:span></text:p>
          <text:p text:style-name="P34">Esto permite trabajar posteriormente con magnitudes físicas (temperatura, humedad, etc.) de forma consistente.</text:p>
        </text:list-item>
      </text:list>
      <text:h text:style-name="P29" text:outline-level="2"><text:span text:style-name="Strong_20_Emphasis">6. Eliminación de valores inválidos</text:span></text:h>
      <text:p text:style-name="Text_20_body">Se eliminan registros incompletos en variables críticas:</text:p>
      <text:p text:style-name="P36"><text:span text:style-name="Source_20_Text"><text:span text:style-name="T7">df_raw = df_raw.dropna(subset=['time', 'entity_id'])</text:span></text:span></text:p>
      <text:p text:style-name="Text_20_body">Esto garantiza que cada registro:</text:p>
      <text:list text:style-name="L17">
        <text:list-item>
          <text:p text:style-name="P37">tenga una referencia temporal válida</text:p>
        </text:list-item>
        <text:list-item>
          <text:p text:style-name="P37">esté asociado a un sensor identificado</text:p>
        </text:list-item>
      </text:list>
      <text:h text:style-name="P29" text:outline-level="2"><text:span text:style-name="Strong_20_Emphasis">7. Ordenación temporal</text:span></text:h>
      <text:p text:style-name="Text_20_body">Los datos se ordenan cronológicamente:</text:p>
      <text:p text:style-name="P36"><text:span text:style-name="Source_20_Text"><text:span text:style-name="T7">.sort_values('time')</text:span></text:span></text:p>
      <text:p text:style-name="Text_20_body">Este paso es fundamental para:</text:p>
      <text:list text:style-name="L18">
        <text:list-item>
          <text:p text:style-name="P38">realizar agregaciones por hora correctamente</text:p>
        </text:list-item>
        <text:list-item>
          <text:p text:style-name="P38">construir variables dependientes del tiempo</text:p>
        </text:list-item>
        <text:list-item>
          <text:p text:style-name="P38">generar el target desplazado (derroche en la siguiente hora)</text:p>
        </text:list-item>
      </text:list>
      <text:h text:style-name="P29" text:outline-level="2"><text:soft-page-break/><text:span text:style-name="Strong_20_Emphasis">8. Validación de la carga</text:span></text:h>
      <text:p text:style-name="Text_20_body">Finalmente, se realiza una verificación básica del proceso:</text:p>
      <text:list text:style-name="L19">
        <text:list-item>
          <text:p text:style-name="P39">Número de filas cargadas en cada dataset</text:p>
        </text:list-item>
        <text:list-item>
          <text:p text:style-name="P39">Inspección de nombres de columnas</text:p>
        </text:list-item>
      </text:list>
      <text:p text:style-name="Text_20_body">Esto permite confirmar que:</text:p>
      <text:list text:style-name="L20">
        <text:list-item>
          <text:p text:style-name="P40">los datos se han cargado correctamente</text:p>
        </text:list-item>
        <text:list-item>
          <text:p text:style-name="P40">la estructura es la esperada</text:p>
        </text:list-item>
        <text:list-item>
          <text:p text:style-name="P40">no existen errores graves en la lectura</text:p>
        </text:list-item>
      </text:list>
      <text:h text:style-name="P29" text:outline-level="2"><draw:frame draw:style-name="fr1" draw:name="Imagen1" text:anchor-type="char" svg:width="17cm" svg:height="4.909cm" draw:z-index="0"><draw:image xlink:href="Pictures/1000000100000284000000BA217D222B.png" xlink:type="simple" xlink:show="embed" xlink:actuate="onLoad" draw:mime-type="image/png"/></draw:frame></text:h>
      <text:h text:style-name="P29" text:outline-level="2"><text:span text:style-name="Strong_20_Emphasis">9. Justificación técnica</text:span></text:h>
      <text:p text:style-name="Text_20_body">Esta fase se ha diseñado con un enfoque robusto frente a datos reales, donde es habitual encontrar:</text:p>
      <text:list text:style-name="L21">
        <text:list-item>
          <text:p text:style-name="P41">registros corruptos</text:p>
        </text:list-item>
        <text:list-item>
          <text:p text:style-name="P41">formatos inconsistentes</text:p>
        </text:list-item>
        <text:list-item>
          <text:p text:style-name="P41">valores no numéricos en variables físicas</text:p>
        </text:list-item>
      </text:list>
      <text:p text:style-name="Text_20_body">El uso de estrategias como:</text:p>
      <text:list text:style-name="L22">
        <text:list-item>
          <text:p text:style-name="P42"><text:span text:style-name="Source_20_Text"><text:span text:style-name="T7">errors='coerce'</text:span></text:span></text:p>
        </text:list-item>
        <text:list-item>
          <text:p text:style-name="P42"><text:span text:style-name="Source_20_Text"><text:span text:style-name="T7">on_bad_lines='warn'</text:span></text:span></text:p>
        </text:list-item>
        <text:list-item>
          <text:p text:style-name="P42">eliminación controlada de valores nulos</text:p>
        </text:list-item>
      </text:list>
      <text:p text:style-name="Text_20_body">permite mantener la máxima cantidad de información válida sin comprometer la calidad del dataset.</text:p>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10. Conclusión</text:span></text:h>
      <text:p text:style-name="Text_20_body">Tras esta etapa se obtiene un dataset limpio a nivel estructural, preparado para:</text:p>
      <text:list text:style-name="L23">
        <text:list-item>
          <text:p text:style-name="P44">filtrado por sensores relevantes</text:p>
        </text:list-item>
        <text:list-item>
          <text:p text:style-name="P44">agregación temporal por horas</text:p>
        </text:list-item>
        <text:list-item>
          <text:p text:style-name="P44">generación de variables derivadas</text:p>
        </text:list-item>
        <text:list-item>
          <text:p text:style-name="P44">construcción del modelo de predicción</text:p>
        </text:list-item>
      </text:list>
      <text:p text:style-name="Text_20_body">Esta fase constituye la base sobre la que se desarrolla todo el pipeline analítico del proyecto.</text:p>
      <text:p text:style-name="Text_20_body"/>
      <text:h text:style-name="P28" text:outline-level="1"><text:span text:style-name="Strong_20_Emphasis">Reconstrucción de la temperatura del Aula 2</text:span></text:h>
      <text:h text:style-name="P29" text:outline-level="2"><text:span text:style-name="Strong_20_Emphasis">1. Objetivo</text:span></text:h>
      <text:p text:style-name="Text_20_body">El objetivo de esta fase es obtener una serie temporal completa y coherente de la temperatura del Aula 2, necesaria para el análisis del comportamiento térmico del aula y la posterior inferencia del estado de la calefacción.</text:p>
      <text:p text:style-name="Text_20_body">Debido a que el dataset del Aula 2 presenta valores incompletos, se plantea una estrategia de reconstrucción basada en la relación existente con el Aula 1.</text:p>
      <text:h text:style-name="P29" text:outline-level="2"><text:span text:style-name="Strong_20_Emphasis"/></text:h>
      <text:h text:style-name="P29" text:outline-level="2"><text:span text:style-name="Strong_20_Emphasis">2. Selección de sensores de referencia (Aula 1)</text:span></text:h>
      <text:p text:style-name="P45">Se seleccionan exclusivamente los sensores de temperatura ambiental del Aula 1:</text:p>
      <text:p text:style-name="P46">sensores_temp_aula1 = [</text:p>
      <text:p text:style-name="P47"><text:s text:c="4"/>'sensor.sensor_temperatura_1_temperature',</text:p>
      <text:p text:style-name="P47"><text:s text:c="4"/>'sensor.sensor_temperatura_2_temperature',</text:p>
      <text:p text:style-name="P47"><text:s text:c="4"/>'sensor.sensor_temperatura_3_temperature',</text:p>
      <text:p text:style-name="P47"><text:s text:c="4"/>'sensor.sensor_temperatura_4_temperature',</text:p>
      <text:p text:style-name="P48">]</text:p>
      <text:p text:style-name="P48"/>
      <text:p text:style-name="P49">Se excluyen otros sensores no relevantes (humedad, presión, temperatura de dispositivos, etc.) para evitar introducir ruido en el análisis.</text:p>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3. Limpieza y agregación de la temperatura del Aula 1</text:span></text:h>
      <text:p text:style-name="Text_20_body">Se realiza un filtrado de valores dentro de un rango físico razonable para interiores:</text:p>
      <text:list text:style-name="L24">
        <text:list-item>
          <text:p text:style-name="P50">Temperatura &gt; 0 °C </text:p>
        </text:list-item>
        <text:list-item>
          <text:p text:style-name="P51">Temperatura &lt; 50 °C </text:p>
        </text:list-item>
      </text:list>
      <text:p text:style-name="Text_20_body">Esto permite eliminar:</text:p>
      <text:list text:style-name="L25">
        <text:list-item>
          <text:p text:style-name="P52">errores de sensor </text:p>
        </text:list-item>
        <text:list-item>
          <text:p text:style-name="P52">valores anómalos </text:p>
        </text:list-item>
        <text:list-item>
          <text:p text:style-name="P53">registros corruptos </text:p>
        </text:list-item>
      </text:list>
      <text:p text:style-name="Text_20_body">Posteriormente, los datos se agregan por hora mediante la media:</text:p>
      <text:p text:style-name="P54"><text:bookmark text:name="code-block-viewer Copia 8"/><text:span text:style-name="T7">df_aula1_temp = df_temp_ref.groupby('datetime')['state_num'].mean()</text:span></text:p>
      <text:p text:style-name="Text_20_body">Este paso es clave para:</text:p>
      <text:list text:style-name="L26">
        <text:list-item>
          <text:p text:style-name="P55">reducir ruido </text:p>
        </text:list-item>
        <text:list-item>
          <text:p text:style-name="P55">unificar granularidad </text:p>
        </text:list-item>
        <text:list-item>
          <text:p text:style-name="P56">adaptarse al enfoque del proyecto (análisis horario) </text:p>
        </text:list-item>
      </text:list>
      <text:h text:style-name="P29" text:outline-level="2"><text:span text:style-name="Strong_20_Emphasis"/></text:h>
      <text:h text:style-name="P29" text:outline-level="2"><text:span text:style-name="Strong_20_Emphasis">4. Procesamiento de la temperatura del Aula 2</text:span></text:h>
      <text:p text:style-name="Text_20_body">El dataset de<text:span text:style-name="T7"> Aula 2 (</text:span><text:span text:style-name="Source_20_Text"><text:span text:style-name="T7">hist</text:span></text:span><text:span text:style-name="T7">) </text:span>presenta la fecha y la hora en columnas separadas, por lo que se reconstruye la variable temporal:</text:p>
      <text:p text:style-name="P54"><text:bookmark text:name="code-block-viewer Copia 1 Copia 1"/>hist['datetime'] = ...</text:p>
      <text:p text:style-name="Text_20_body"><text:span text:style-name="T9">A</text:span> continuación:</text:p>
      <text:list text:style-name="L27">
        <text:list-item>
          <text:p text:style-name="P57">se convierte la temperatura a formato numérico </text:p>
        </text:list-item>
        <text:list-item>
          <text:p text:style-name="P58">se agrega por horas mediante media </text:p>
        </text:list-item>
      </text:list>
      <text:p text:style-name="P59"><text:bookmark text:name="code-block-viewer Copia 2"/>.resample('h').mean()</text:p>
      <text:p text:style-name="P59"/>
      <text:h text:style-name="P29" text:outline-level="2"><text:span text:style-name="Strong_20_Emphasis">5. Cálculo del sesgo térmico entre aulas</text:span></text:h>
      <text:p text:style-name="Text_20_body">Se identifican los periodos en los que existen datos simultáneos en ambas aulas:</text:p>
      <text:p text:style-name="P59"><text:bookmark text:name="code-block-viewer Copia 3 Copia 1"/>how='inner'</text:p>
      <text:p text:style-name="Text_20_body">Sobre estos datos se calcula la diferencia media:</text:p>
      <text:p text:style-name="P59"><text:bookmark text:name="code-block-viewer Copia 4 Copia 1"/>diferencia_temp_aula2 = mean(temp_aula2 - temp_aula1)</text:p>
      <text:h text:style-name="P60" text:outline-level="3"><text:span text:style-name="Strong_20_Emphasis"/></text:h>
      <text:h text:style-name="P60" text:outline-level="3"><text:span text:style-name="Strong_20_Emphasis">Resultado obtenido</text:span></text:h>
      <text:p text:style-name="Text_20_body">En este caso:</text:p>
      <text:p text:style-name="P61"><text:span text:style-name="Strong_20_Emphasis">Diferencia media Aula2 - Aula1: 1.41 °C</text:span></text:p>
      <text:p text:style-name="Text_20_body">Esto indica que, en promedio, el Aula 2 presenta una temperatura superior en aproximadamente 1.41 °C respecto al Aula 1.</text:p>
      <text:h text:style-name="P29" text:outline-level="2"><text:soft-page-break/><text:span text:style-name="Strong_20_Emphasis">6. Reconstrucción de la serie de Aula 2</text:span></text:h>
      <text:p text:style-name="P62">Dado que existen valores faltantes en el Aula 2, se completa la serie utilizando el siguiente criterio:</text:p>
      <text:p text:style-name="P63">temp_aula2_completada = temp_aula2 (real)</text:p>
      <text:p text:style-name="P63">si no existe → temp_aula1 + diferencia_media</text:p>
      <text:p text:style-name="P64">Este enfoque permite:</text:p>
      <text:list text:style-name="L28">
        <text:list-header>
          <text:p text:style-name="P65">conservar los datos reales cuando existen </text:p>
        </text:list-header>
        <text:list-item>
          <text:p text:style-name="P66">estimar valores faltantes de forma coherente </text:p>
        </text:list-item>
        <text:list-item>
          <text:p text:style-name="P67">mantener continuidad temporal </text:p>
          <text:p text:style-name="P67"/>
        </text:list-item>
      </text:list>
      <text:h text:style-name="P29" text:outline-level="2"><text:span text:style-name="Strong_20_Emphasis">7. Validación del resultado</text:span></text:h>
      <text:p text:style-name="Text_20_body">En la salida generada se observa:</text:p>
      <text:list text:style-name="L29">
        <text:list-item>
          <text:p text:style-name="P68"><text:span text:style-name="Source_20_Text"><text:span text:style-name="T7">temp_aula2</text:span></text:span><text:span text:style-name="T7"> contiene valores nulos en muchos periodos </text:span></text:p>
        </text:list-item>
        <text:list-item>
          <text:p text:style-name="P69"><text:span text:style-name="Source_20_Text"><text:span text:style-name="T7">temp_aula2_completada</text:span></text:span><text:span text:style-name="T7"> presenta valores continuos</text:span> </text:p>
        </text:list-item>
      </text:list>
      <text:p text:style-name="Text_20_body">Ejemplo:</text:p>
      <text:list text:style-name="L30">
        <text:list-item>
          <text:p text:style-name="P70">Aula 1: <text:span text:style-name="Strong_20_Emphasis">21.15 °C</text:span> </text:p>
        </text:list-item>
        <text:list-item>
          <text:p text:style-name="P71">Aula 2 estimada: <text:span text:style-name="Strong_20_Emphasis">22.56 °C</text:span> </text:p>
        </text:list-item>
      </text:list>
      <text:p text:style-name="Text_20_body">Esto coincide con la diferencia media calculada (+1.41 °C), confirmando la coherencia del modelo.</text:p>
      <text:h text:style-name="P29" text:outline-level="2"><text:span text:style-name="Strong_20_Emphasis"/></text:h>
      <text:h text:style-name="P29" text:outline-level="2"><text:span text:style-name="Strong_20_Emphasis">8. Justificación técnica</text:span></text:h>
      <text:p text:style-name="Text_20_body">La reconstrucción se basa en la hipótesis de que:</text:p>
      <text:p text:style-name="P61">Las condiciones térmicas de ambas aulas están correlacionadas, presentando una diferencia relativamente estable en el tiempo.</text:p>
      <text:p text:style-name="Text_20_body">Este enfoque es válido debido a:</text:p>
      <text:list text:style-name="L31">
        <text:list-item>
          <text:p text:style-name="P72">proximidad física de las aulas </text:p>
        </text:list-item>
        <text:list-item>
          <text:p text:style-name="P72">condiciones ambientales similares </text:p>
        </text:list-item>
        <text:list-item>
          <text:p text:style-name="P73">comportamiento térmico comparable </text:p>
        </text:list-item>
      </text:list>
      <text:p text:style-name="Text_20_body">Frente a alternativas más complejas (modelos de regresión), se opta por un enfoque simple y robusto, suficiente para el objetivo del proyecto.</text:p>
      <text:h text:style-name="P29" text:outline-level="2"><text:span text:style-name="Strong_20_Emphasis"/></text:h>
      <text:h text:style-name="P29" text:outline-level="2"><text:span text:style-name="Strong_20_Emphasis"/></text:h>
      <text:p text:style-name="P43"><text:span text:style-name="Strong_20_Emphasis"/></text:p>
      <text:h text:style-name="P29" text:outline-level="2"><text:soft-page-break/><text:span text:style-name="Strong_20_Emphasis">9. </text:span><text:span text:style-name="Strong_20_Emphasis"><text:span text:style-name="T10">Posibles l</text:span></text:span><text:span text:style-name="Strong_20_Emphasis">imitaciones</text:span></text:h>
      <text:p text:style-name="Text_20_body">Este método asume que la diferencia entre aulas es constante, lo cual puede no cumplirse en situaciones puntuales:</text:p>
      <text:list text:style-name="L32">
        <text:list-item>
          <text:p text:style-name="P74">cambios de ocupación </text:p>
        </text:list-item>
        <text:list-item>
          <text:p text:style-name="P74">ventilación distinta </text:p>
        </text:list-item>
        <text:list-item>
          <text:p text:style-name="P75">exposición solar diferente </text:p>
        </text:list-item>
      </text:list>
      <text:p text:style-name="Text_20_body">No obstante, para el objetivo del proyecto (detección de derroche), esta aproximación resulta adecuada.</text:p>
      <text:p text:style-name="Text_20_body"/>
      <text:h text:style-name="P29" text:outline-level="2"><text:span text:style-name="Strong_20_Emphasis">10. Resultado final</text:span></text:h>
      <text:p text:style-name="Text_20_body">Se genera un dataset con:</text:p>
      <text:list text:style-name="L33">
        <text:list-item>
          <text:p text:style-name="P76">temperatura Aula 1 </text:p>
        </text:list-item>
        <text:list-item>
          <text:p text:style-name="P76">temperatura Aula 2 (real cuando existe) </text:p>
        </text:list-item>
        <text:list-item>
          <text:p text:style-name="P77">temperatura Aula 2 reconstruida </text:p>
        </text:list-item>
      </text:list>
      <text:p text:style-name="Text_20_body">El resultado se exporta en:</text:p>
      <text:p text:style-name="P61"><text:span text:style-name="Source_20_Text"><text:span text:style-name="T7">TEMPERATURAS_AULA2.csv</text:span></text:span></text:p>
      <text:p text:style-name="Text_20_body">Este dataset será utilizado en fases posteriores para:</text:p>
      <text:list text:style-name="L34">
        <text:list-item>
          <text:p text:style-name="P78">inferir el estado de la calefacción </text:p>
        </text:list-item>
        <text:list-item>
          <text:p text:style-name="P78">construir variables del modelo </text:p>
        </text:list-item>
        <text:list-item>
          <text:p text:style-name="P79">análisis térmico del aula</text:p>
        </text:list-item>
      </text:list>
      <text:p text:style-name="Text_20_body"><draw:frame draw:style-name="fr2" draw:name="Imagen2" text:anchor-type="char" svg:width="14.766cm" svg:height="10.109cm" draw:z-index="1"><draw:image xlink:href="Pictures/100000010000022E0000017E678FF809.png" xlink:type="simple" xlink:show="embed" xlink:actuate="onLoad" draw:mime-type="image/png"/></draw:frame></text:p>
      <text:h text:style-name="P28" text:outline-level="1"><text:soft-page-break/><text:span text:style-name="Strong_20_Emphasis">Comprobaciones y validación de la serie temporal de temperaturas</text:span></text:h>
      <text:h text:style-name="P29" text:outline-level="2"><text:span text:style-name="Strong_20_Emphasis">1. Objetivo</text:span></text:h>
      <text:p text:style-name="Text_20_body">El objetivo de esta fase es verificar la coherencia, integridad y calidad de la serie temporal generada tras la reconstrucción de la temperatura del Aula 2.</text:p>
      <text:p text:style-name="Text_20_body">Antes de continuar con el modelado, es imprescindible validar que:</text:p>
      <text:list text:style-name="L35">
        <text:list-item>
          <text:p text:style-name="P80">los datos cubren el periodo esperado </text:p>
        </text:list-item>
        <text:list-item>
          <text:p text:style-name="P80">no existen discontinuidades relevantes </text:p>
        </text:list-item>
        <text:list-item>
          <text:p text:style-name="P81">la reconstrucción es consistente con la señal real </text:p>
        </text:list-item>
      </text:list>
      <text:h text:style-name="P29" text:outline-level="2"><text:span text:style-name="Strong_20_Emphasis"/></text:h>
      <text:h text:style-name="P29" text:outline-level="2"><text:span text:style-name="Strong_20_Emphasis">2. Verificación estructural</text:span></text:h>
      <text:p text:style-name="Text_20_body">Se realiza una inspección de los últimos registros del dataset para comprobar:</text:p>
      <text:list text:style-name="L36">
        <text:list-item>
          <text:p text:style-name="P82">correcta alineación temporal </text:p>
        </text:list-item>
        <text:list-item>
          <text:p text:style-name="P82">presencia de valores en las columnas clave </text:p>
        </text:list-item>
        <text:list-item>
          <text:p text:style-name="P83">coherencia entre valores reales y reconstruidos </text:p>
        </text:list-item>
      </text:list>
      <text:p text:style-name="Text_20_body">En los últimos registros se observa que:</text:p>
      <text:list text:style-name="L37">
        <text:list-item>
          <text:p text:style-name="P84"><text:span text:style-name="Source_20_Text">temp_aula2</text:span> contiene datos reales </text:p>
        </text:list-item>
        <text:list-item>
          <text:p text:style-name="P85"><text:span text:style-name="Source_20_Text">temp_aula2_completada</text:span> coincide con dichos valores cuando están disponibles </text:p>
        </text:list-item>
      </text:list>
      <text:p text:style-name="Text_20_body">Esto confirma que el proceso de imputación respeta los datos originales.</text:p>
      <text:h text:style-name="P29" text:outline-level="2"><text:span text:style-name="Strong_20_Emphasis"/></text:h>
      <text:h text:style-name="P29" text:outline-level="2"><text:span text:style-name="Strong_20_Emphasis">3. Rango temporal del dataset</text:span></text:h>
      <text:p text:style-name="Text_20_body">El rango temporal obtenido es:</text:p>
      <text:p text:style-name="P61"><text:span text:style-name="Strong_20_Emphasis">2024-12-10 → 2026-03-02</text:span></text:p>
      <text:p text:style-name="Text_20_body">Este periodo abarca más de un año completo, lo que permite:</text:p>
      <text:list text:style-name="L38">
        <text:list-item>
          <text:p text:style-name="P86">capturar estacionalidad (invierno/verano) </text:p>
        </text:list-item>
        <text:list-item>
          <text:p text:style-name="P86">analizar variaciones térmicas reales </text:p>
        </text:list-item>
        <text:list-item>
          <text:p text:style-name="P87">mejorar la capacidad de generalización del modelo </text:p>
        </text:list-item>
      </text:list>
      <text:h text:style-name="P29" text:outline-level="2"><text:span text:style-name="Strong_20_Emphasis"/></text:h>
      <text:p text:style-name="P43"><text:span text:style-name="Strong_20_Emphasis"/></text:p>
      <text:p text:style-name="P43"><text:span text:style-name="Strong_20_Emphasis"/></text:p>
      <text:h text:style-name="P29" text:outline-level="2"><text:soft-page-break/><text:span text:style-name="Strong_20_Emphasis">4. Visualización de la evolución térmica</text:span></text:h>
      <text:p text:style-name="Text_20_body">Se representa la evolución de:</text:p>
      <text:list text:style-name="L39">
        <text:list-item>
          <text:p text:style-name="P88">Temperatura Aula 1 (referencia) </text:p>
        </text:list-item>
        <text:list-item>
          <text:p text:style-name="P89">Temperatura Aula 2 (reconstruida/completada) </text:p>
        </text:list-item>
      </text:list>
      <text:p text:style-name="Text_20_body">La gráfica muestra ambas series temporales a lo largo del tiempo.</text:p>
      <text:h text:style-name="P29" text:outline-level="2"><text:span text:style-name="Strong_20_Emphasis"/></text:h>
      <text:h text:style-name="P29" text:outline-level="2"><text:span text:style-name="Strong_20_Emphasis">5. Análisis de la gráfica</text:span></text:h>
      <text:p text:style-name="Text_20_body">Del análisis visual se extraen las siguientes conclusiones:</text:p>
      <text:h text:style-name="P60" text:outline-level="3"><text:span text:style-name="Strong_20_Emphasis">5.1 Alta correlación entre aulas</text:span></text:h>
      <text:p text:style-name="Text_20_body">Las dos curvas presentan una evolución muy similar:</text:p>
      <text:list text:style-name="L40">
        <text:list-item>
          <text:p text:style-name="P90">mismas tendencias </text:p>
        </text:list-item>
        <text:list-item>
          <text:p text:style-name="P90">mismos picos y valles </text:p>
        </text:list-item>
        <text:list-item>
          <text:p text:style-name="P91">comportamiento sincronizado </text:p>
        </text:list-item>
      </text:list>
      <text:p text:style-name="Text_20_body">Esto valida la hipótesis inicial de que ambas aulas tienen un comportamiento térmico comparable.</text:p>
      <text:h text:style-name="P60" text:outline-level="3"><text:span text:style-name="Strong_20_Emphasis"/></text:h>
      <text:h text:style-name="P60" text:outline-level="3"><text:span text:style-name="Strong_20_Emphasis">5.2 Diferencia térmica consistente</text:span></text:h>
      <text:p text:style-name="Text_20_body">Se observa que la temperatura del Aula 2 es sistemáticamente superior a la del Aula 1, manteniendo una separación relativamente constante.</text:p>
      <text:p text:style-name="Text_20_body">Esto confirma la validez del enfoque utilizado en la reconstrucción:</text:p>
      <text:p text:style-name="P61">uso de un sesgo medio constante (+1.41 °C)</text:p>
      <text:h text:style-name="P60" text:outline-level="3"><text:span text:style-name="Strong_20_Emphasis"/></text:h>
      <text:h text:style-name="P60" text:outline-level="3"><text:span text:style-name="Strong_20_Emphasis">5.3 Presencia de estacionalidad</text:span></text:h>
      <text:p text:style-name="Text_20_body">Se identifican claramente patrones estacionales:</text:p>
      <text:list text:style-name="L41">
        <text:list-item>
          <text:p text:style-name="P92">temperaturas elevadas en meses cálidos </text:p>
        </text:list-item>
        <text:list-item>
          <text:p text:style-name="P93">temperaturas más bajas en invierno </text:p>
        </text:list-item>
      </text:list>
      <text:p text:style-name="Text_20_body">Esto es especialmente relevante para:</text:p>
      <text:list text:style-name="L42">
        <text:list-item>
          <text:p text:style-name="P94">el comportamiento de la calefacción </text:p>
        </text:list-item>
        <text:list-item>
          <text:p text:style-name="P95">la detección de derroche </text:p>
        </text:list-item>
      </text:list>
      <text:h text:style-name="P60" text:outline-level="3"><text:span text:style-name="Strong_20_Emphasis"/></text:h>
      <text:p text:style-name="P43"><text:span text:style-name="Strong_20_Emphasis"/></text:p>
      <text:h text:style-name="P60" text:outline-level="3"><text:soft-page-break/><text:span text:style-name="Strong_20_Emphasis">5.4 Continuidad de la serie reconstruida</text:span></text:h>
      <text:p text:style-name="Text_20_body">No se observan discontinuidades bruscas en la serie de <text:span text:style-name="Source_20_Text"><text:span text:style-name="T7">temp_aula2_completada</text:span></text:span>, lo que indica que:</text:p>
      <text:list text:style-name="L43">
        <text:list-item>
          <text:p text:style-name="P96">la imputación de valores faltantes es coherente </text:p>
        </text:list-item>
        <text:list-item>
          <text:p text:style-name="P97">no se introducen saltos artificiales </text:p>
        </text:list-item>
      </text:list>
      <text:h text:style-name="P29" text:outline-level="2"><text:span text:style-name="Strong_20_Emphasis"/></text:h>
      <text:h text:style-name="P29" text:outline-level="2"><text:span text:style-name="Strong_20_Emphasis">6. Distribución de registros por año</text:span></text:h>
      <text:p text:style-name="Text_20_body">Se obtiene la siguiente distribución:</text:p>
      <text:list text:style-name="L44">
        <text:list-item>
          <text:p text:style-name="P98">2024: 509 registros </text:p>
        </text:list-item>
        <text:list-item>
          <text:p text:style-name="P98">2025: 7474 registros </text:p>
        </text:list-item>
        <text:list-item>
          <text:p text:style-name="P99">2026: 1450 registros </text:p>
        </text:list-item>
      </text:list>
      <text:p text:style-name="Text_20_body">Esto indica que:</text:p>
      <text:list text:style-name="L45">
        <text:list-item>
          <text:p text:style-name="P100">el dataset está centrado principalmente en 2025 </text:p>
        </text:list-item>
        <text:list-item>
          <text:p text:style-name="P100">existe suficiente volumen de datos para el entrenamiento de modelos </text:p>
        </text:list-item>
        <text:list-item>
          <text:p text:style-name="P101">se dispone de continuidad temporal adecuada </text:p>
        </text:list-item>
      </text:list>
      <text:h text:style-name="P29" text:outline-level="2"><text:span text:style-name="Strong_20_Emphasis"/></text:h>
      <text:h text:style-name="P29" text:outline-level="2"><text:span text:style-name="Strong_20_Emphasis">7. Justificación técnica</text:span></text:h>
      <text:p text:style-name="Text_20_body">La validación mediante visualización permite:</text:p>
      <text:list text:style-name="L46">
        <text:list-item>
          <text:p text:style-name="P102">detectar anomalías que no se identifican con métricas numéricas </text:p>
        </text:list-item>
        <text:list-item>
          <text:p text:style-name="P102">confirmar hipótesis de correlación entre variables </text:p>
        </text:list-item>
        <text:list-item>
          <text:p text:style-name="P103">verificar la calidad del proceso de imputación </text:p>
        </text:list-item>
      </text:list>
      <text:p text:style-name="Text_20_body">Este paso es fundamental antes de:</text:p>
      <text:list text:style-name="L47">
        <text:list-item>
          <text:p text:style-name="P104">construir variables derivadas </text:p>
        </text:list-item>
        <text:list-item>
          <text:p text:style-name="P104">entrenar modelos de ML </text:p>
        </text:list-item>
        <text:list-item>
          <text:p text:style-name="P105">definir el target </text:p>
        </text:list-item>
      </text:list>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8. Conclusión</text:span></text:h>
      <text:p text:style-name="Text_20_body">La serie temporal generada presenta:</text:p>
      <text:list text:style-name="L48">
        <text:list-item>
          <text:p text:style-name="P106">coherencia estructural </text:p>
        </text:list-item>
        <text:list-item>
          <text:p text:style-name="P106">continuidad temporal </text:p>
        </text:list-item>
        <text:list-item>
          <text:p text:style-name="P106">correlación entre variables </text:p>
        </text:list-item>
        <text:list-item>
          <text:p text:style-name="P107">comportamiento realista </text:p>
        </text:list-item>
      </text:list>
      <text:p text:style-name="Text_20_body">Por tanto, se considera válida para su uso en las siguientes fases del proyecto, especialmente en la inferencia del estado de la calefacción y la construcción del modelo predictivo.</text:p>
      <text:p text:style-name="Text_20_body"/>
      <text:p text:style-name="Text_20_body"><draw:frame draw:style-name="fr3" draw:name="Imagen3" text:anchor-type="char" svg:width="17cm" svg:height="16.729cm" draw:z-index="2"><draw:image xlink:href="Pictures/100000010000032F00000322B1DF55D5.png" xlink:type="simple" xlink:show="embed" xlink:actuate="onLoad" draw:mime-type="image/png"/></draw:frame></text:p>
      <text:p text:style-name="Text_20_body"/>
      <text:p text:style-name="Text_20_body"/>
      <text:h text:style-name="P28" text:outline-level="1"><text:soft-page-break/><text:span text:style-name="Strong_20_Emphasis">Reconstrucción de la humedad del Aula 2</text:span></text:h>
      <text:h text:style-name="P29" text:outline-level="2"><text:span text:style-name="Strong_20_Emphasis">1. Objetivo</text:span></text:h>
      <text:p text:style-name="Text_20_body">El objetivo de esta fase es reconstruir una serie temporal completa de la humedad relativa del Aula 2, siguiendo una metodología análoga a la empleada en la reconstrucción de la temperatura.</text:p>
      <text:p text:style-name="Text_20_body">La humedad es una variable relevante en el comportamiento térmico del aula y puede influir indirectamente en la eficiencia del sistema de climatización.</text:p>
      <text:p text:style-name="P108">Se ha optado por una metodología homogénea en la reconstrucción de variables (temperatura y humedad), con el fin de mantener coherencia en el pipeline de datos y facilitar la trazabilidad del proceso.</text:p>
      <text:p text:style-name="P108"/>
      <text:h text:style-name="P29" text:outline-level="2"><text:span text:style-name="Strong_20_Emphasis">2. Identificación automática de sensores de humedad</text:span></text:h>
      <text:p text:style-name="Text_20_body">A diferencia de la temperatura, donde los sensores estaban claramente definidos, en este caso se realiza una detección dinámica de sensores:</text:p>
      <text:p text:style-name="P36"><text:span text:style-name="Source_20_Text"><text:span text:style-name="T7">if 'humidity' in s.lower() and 'device' not in s.lower()</text:span></text:span></text:p>
      <text:p text:style-name="Text_20_body">Este enfoque permite:</text:p>
      <text:list text:style-name="L49">
        <text:list-item>
          <text:p text:style-name="P109">identificar automáticamente todos los sensores de humedad relevantes</text:p>
        </text:list-item>
        <text:list-item>
          <text:p text:style-name="P109">excluir sensores no ambientales (por ejemplo, temperatura interna de dispositivos)</text:p>
        </text:list-item>
        <text:list-item>
          <text:p text:style-name="P109">adaptar el código a cambios en el sistema de sensores</text:p>
        </text:list-item>
      </text:list>
      <text:h text:style-name="P60" text:outline-level="3"><text:span text:style-name="Strong_20_Emphasis">Resultado</text:span></text:h>
      <text:p text:style-name="Text_20_body">Se obtiene una lista de sensores de humedad válidos del Aula 1, que serán utilizados como referencia.</text:p>
      <text:h text:style-name="P29" text:outline-level="2"><text:span text:style-name="Strong_20_Emphasis"/></text:h>
      <text:h text:style-name="P29" text:outline-level="2"><text:span text:style-name="Strong_20_Emphasis">3. Limpieza y agregación de la humedad del Aula 1</text:span></text:h>
      <text:p text:style-name="Text_20_body">Se aplica un filtro de valores físicos válidos:</text:p>
      <text:list text:style-name="L50">
        <text:list-item>
          <text:p text:style-name="P110">Humedad ≥ 0 %</text:p>
        </text:list-item>
        <text:list-item>
          <text:p text:style-name="P110">Humedad ≤ 100 %</text:p>
        </text:list-item>
      </text:list>
      <text:p text:style-name="Text_20_body">Esto permite eliminar:</text:p>
      <text:list text:style-name="L51">
        <text:list-item>
          <text:p text:style-name="P111">errores de medición</text:p>
        </text:list-item>
        <text:list-item>
          <text:p text:style-name="P111">valores fuera de rango</text:p>
        </text:list-item>
        <text:list-item>
          <text:p text:style-name="P111">datos corruptos</text:p>
        </text:list-item>
      </text:list>
      <text:p text:style-name="Text_20_body">Posteriormente, se agregan los datos por hora mediante la media:</text:p>
      <text:p text:style-name="P36"><text:span text:style-name="Source_20_Text"><text:span text:style-name="T7">groupby('datetime').mean()</text:span></text:span></text:p>
      <text:p text:style-name="Text_20_body"><text:soft-page-break/>Esto permite:</text:p>
      <text:list text:style-name="L52">
        <text:list-item>
          <text:p text:style-name="P112">suavizar variaciones puntuales</text:p>
        </text:list-item>
        <text:list-item>
          <text:p text:style-name="P113">trabajar con la misma granularidad que el resto del proyecto</text:p>
          <text:p text:style-name="P113"/>
        </text:list-item>
      </text:list>
      <text:h text:style-name="P114" text:outline-level="2"><text:span text:style-name="Strong_20_Emphasis">4. Procesamiento de la humedad del Aula 2</text:span></text:h>
      <text:p text:style-name="Text_20_body">Se extrae la humedad desde el dataset <text:span text:style-name="Source_20_Text">hist</text:span>:</text:p>
      <text:p text:style-name="P36"><text:span text:style-name="Source_20_Text"><text:span text:style-name="T7">hist['humidity %RH']</text:span></text:span></text:p>
      <text:p text:style-name="Text_20_body">Se convierte a formato numérico y se agrega por horas:</text:p>
      <text:p text:style-name="P36"><text:span text:style-name="Source_20_Text"><text:span text:style-name="T7">.resample('h').mean()</text:span></text:span></text:p>
      <text:h text:style-name="P29" text:outline-level="2"><text:span text:style-name="Strong_20_Emphasis"/></text:h>
      <text:h text:style-name="P29" text:outline-level="2"><text:span text:style-name="Strong_20_Emphasis">5. Cálculo del sesgo entre aulas</text:span></text:h>
      <text:p text:style-name="Text_20_body">Se identifican los periodos con datos simultáneos en ambas aulas y se calcula la diferencia media:</text:p>
      <text:p text:style-name="P36"><text:span text:style-name="Source_20_Text">diferencia_hum_aula2 = mean(hum_aula2 - hum_aula1)</text:span></text:p>
      <text:h text:style-name="P60" text:outline-level="3"><text:span text:style-name="Strong_20_Emphasis">Resultado obtenido</text:span></text:h>
      <text:p text:style-name="P61"><text:span text:style-name="Strong_20_Emphasis">Diferencia media Aula2 - Aula1: -1.21 puntos de humedad</text:span></text:p>
      <text:p text:style-name="Text_20_body">Esto indica que, en promedio, el Aula 2 presenta una humedad ligeramente inferior a la del Aula 1.</text:p>
      <text:h text:style-name="P29" text:outline-level="2"><text:span text:style-name="Strong_20_Emphasis"/></text:h>
      <text:h text:style-name="P29" text:outline-level="2"><text:span text:style-name="Strong_20_Emphasis">6. Reconstrucción de la humedad del Aula 2</text:span></text:h>
      <text:p text:style-name="Text_20_body">Se completa la serie utilizando el siguiente criterio:</text:p>
      <text:p text:style-name="P36"><text:span text:style-name="Source_20_Text"><text:span text:style-name="T7">hum_aula2_completada = hum_aula2 (real)</text:span></text:span></text:p>
      <text:p text:style-name="P36"><text:span text:style-name="Source_20_Text"><text:span text:style-name="T7">si no existe → hum_aula1 + diferencia_media</text:span></text:span></text:p>
      <text:p text:style-name="Text_20_body">Además, se aplica una restricción física:</text:p>
      <text:p text:style-name="P36"><text:span text:style-name="Source_20_Text"><text:span text:style-name="T7">clip(0, 100)</text:span></text:span></text:p>
      <text:p text:style-name="Text_20_body">Esto garantiza que los valores reconstruidos:</text:p>
      <text:list text:style-name="L53">
        <text:list-item>
          <text:p text:style-name="P115">permanezcan dentro del rango físico válido</text:p>
        </text:list-item>
        <text:list-item>
          <text:p text:style-name="P115">eviten incoherencias tras la imputación</text:p>
        </text:list-item>
      </text:list>
      <text:h text:style-name="P29" text:outline-level="2"><text:span text:style-name="Strong_20_Emphasis"/></text:h>
      <text:p text:style-name="P43"><text:span text:style-name="Strong_20_Emphasis"/></text:p>
      <text:p text:style-name="P43"><text:span text:style-name="Strong_20_Emphasis"/></text:p>
      <text:h text:style-name="P29" text:outline-level="2"><text:soft-page-break/><text:span text:style-name="Strong_20_Emphasis">7. Validación del resultado</text:span></text:h>
      <text:p text:style-name="Text_20_body">En los datos generados se observa que:</text:p>
      <text:list text:style-name="L54">
        <text:list-item>
          <text:p text:style-name="P116"><text:span text:style-name="Source_20_Text"><text:span text:style-name="T7">hum_aula2</text:span></text:span> presenta valores faltantes</text:p>
        </text:list-item>
        <text:list-item>
          <text:p text:style-name="P116"><text:span text:style-name="Source_20_Text"><text:span text:style-name="T7">hum_aula2_completada</text:span></text:span> ofrece una serie continua</text:p>
        </text:list-item>
      </text:list>
      <text:p text:style-name="Text_20_body">Ejemplo:</text:p>
      <text:list text:style-name="L55">
        <text:list-item>
          <text:p text:style-name="P117">Aula 1: <text:span text:style-name="Strong_20_Emphasis">46.72 %</text:span></text:p>
        </text:list-item>
        <text:list-item>
          <text:p text:style-name="P117">Aula 2 estimada: <text:span text:style-name="Strong_20_Emphasis">45.51 %</text:span></text:p>
        </text:list-item>
      </text:list>
      <text:p text:style-name="Text_20_body">Esto es coherente con el sesgo calculado (-1.21), lo que valida el modelo de reconstrucción.</text:p>
      <text:h text:style-name="P29" text:outline-level="2"><text:span text:style-name="Strong_20_Emphasis">8. Justificación técnica</text:span></text:h>
      <text:p text:style-name="Text_20_body">La metodología utilizada es coherente con la aplicada en la temperatura, lo que aporta:</text:p>
      <text:list text:style-name="L56">
        <text:list-item>
          <text:p text:style-name="P118">consistencia en el pipeline de datos</text:p>
        </text:list-item>
        <text:list-item>
          <text:p text:style-name="P118">simplicidad en la implementación</text:p>
        </text:list-item>
        <text:list-item>
          <text:p text:style-name="P118">interpretabilidad del modelo</text:p>
        </text:list-item>
      </text:list>
      <text:p text:style-name="Text_20_body"/>
      <text:h text:style-name="P29" text:outline-level="2"><text:span text:style-name="Strong_20_Emphasis">9. Limitaciones</text:span></text:h>
      <text:p text:style-name="Text_20_body">Al igual que en la temperatura, este enfoque presenta ciertas limitaciones:</text:p>
      <text:list text:style-name="L57">
        <text:list-item>
          <text:p text:style-name="P119">no captura variaciones puntuales entre aulas</text:p>
        </text:list-item>
        <text:list-item>
          <text:p text:style-name="P119">asume una relación lineal simple</text:p>
        </text:list-item>
        <text:list-item>
          <text:p text:style-name="P119">no considera factores externos como ventilación o ocupación</text:p>
        </text:list-item>
      </text:list>
      <text:p text:style-name="Text_20_body">Sin embargo, para el objetivo del proyecto, esta aproximación resulta suficiente y robusta.</text:p>
      <text:h text:style-name="P29" text:outline-level="2"><text:span text:style-name="Strong_20_Emphasis"/></text:h>
      <text:h text:style-name="P29" text:outline-level="2"><text:span text:style-name="Strong_20_Emphasis">10. Resultado final</text:span></text:h>
      <text:p text:style-name="Text_20_body">Se genera el archivo:</text:p>
      <text:p text:style-name="P61"><text:span text:style-name="Source_20_Text"><text:span text:style-name="T7">HUMEDAD_AULA2.csv</text:span></text:span></text:p>
      <text:p text:style-name="Text_20_body">que contiene:</text:p>
      <text:list text:style-name="L58">
        <text:list-item>
          <text:p text:style-name="P120">humedad Aula 1</text:p>
        </text:list-item>
        <text:list-item>
          <text:p text:style-name="P120">humedad Aula 2 (cuando existe)</text:p>
        </text:list-item>
        <text:list-item>
          <text:p text:style-name="P120">humedad Aula 2 reconstruida</text:p>
        </text:list-item>
      </text:list>
      <text:p text:style-name="Text_20_body"/>
      <text:p text:style-name="Text_20_body"/>
      <text:p text:style-name="P121"><text:soft-page-break/>Este dataset será utilizado en fases posteriores como variable de entrada para el modelo.</text:p>
      <text:p text:style-name="P121"><text:span text:style-name="T11">Posteriormente se realiza la representación gráfica temporal igual que se hizo con la temperatura. </text:span>La validación visual se utiliza como mecanismo complementario a las métricas numéricas, permitiendo detectar patrones y posibles anomalías que no serían evidentes mediante análisis estadístico exclusivamente.</text:p>
      <text:p text:style-name="P121"/>
      <text:p text:style-name="Text_20_body"><draw:frame draw:style-name="fr3" draw:name="Imagen4" text:anchor-type="char" svg:width="17cm" svg:height="6.817cm" draw:z-index="3"><draw:image xlink:href="Pictures/100000010000031F000001992213BF5A.png" xlink:type="simple" xlink:show="embed" xlink:actuate="onLoad" draw:mime-type="image/png"/></draw:frame></text:p>
      <text:h text:style-name="P29" text:outline-level="2"><draw:frame draw:style-name="fr1" draw:name="Imagen5" text:anchor-type="char" svg:width="17cm" svg:height="7.87cm" draw:z-index="4"><draw:image xlink:href="Pictures/100000010000032A0000017768AD4F58.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h text:style-name="P28" text:outline-level="1"><text:soft-page-break/><text:span text:style-name="Strong_20_Emphasis">Construcción del DataFrame horario base</text:span></text:h>
      <text:h text:style-name="P29" text:outline-level="2"><text:span text:style-name="Strong_20_Emphasis">1. Objetivo</text:span></text:h>
      <text:p text:style-name="Text_20_body">El objetivo de esta fase es construir un <text:span text:style-name="Strong_20_Emphasis">dataset horario unificado</text:span> que integre en una sola estructura todas las variables relevantes del proyecto: variables temporales, variables reconstruidas del aula y variables numéricas procedentes de sensores internos y externos.</text:p>
      <text:p text:style-name="Text_20_body">Este DataFrame constituye la base analítica a partir de la cual se calcularán posteriormente:</text:p>
      <text:list text:style-name="L59">
        <text:list-item>
          <text:p text:style-name="P122">la temperatura inferida de la calefacción </text:p>
        </text:list-item>
        <text:list-item>
          <text:p text:style-name="P122">el estado de calefacción encendida/apagada </text:p>
        </text:list-item>
        <text:list-item>
          <text:p text:style-name="P122">el indicador de derroche </text:p>
        </text:list-item>
        <text:list-item>
          <text:p text:style-name="P123">el dataset final para el modelo de IA </text:p>
        </text:list-item>
      </text:list>
      <text:h text:style-name="P29" text:outline-level="2"><text:span text:style-name="Strong_20_Emphasis"/></text:h>
      <text:h text:style-name="P29" text:outline-level="2"><text:span text:style-name="Strong_20_Emphasis">2. Definición de la estructura temporal</text:span></text:h>
      <text:p text:style-name="Text_20_body">Como punto de partida se crea un nuevo DataFrame indexado por la serie temporal horaria ya validada en la fase anterior:</text:p>
      <text:p text:style-name="P45">df_base_horaria = pd.DataFrame(index=df_final_temp.index.copy())</text:p>
      <text:p text:style-name="Text_20_body">A partir de este índice temporal se generan tres variables de contexto: </text:p>
      <text:list text:style-name="L60">
        <text:list-item>
          <text:p text:style-name="P124"><text:span text:style-name="Strong_20_Emphasis">hora</text:span>: hora del día </text:p>
        </text:list-item>
        <text:list-item>
          <text:p text:style-name="P124"><text:span text:style-name="Strong_20_Emphasis">dia_semana</text:span>: día de la semana </text:p>
        </text:list-item>
        <text:list-item>
          <text:p text:style-name="P125"><text:span text:style-name="Strong_20_Emphasis">mes</text:span>: mes del año </text:p>
        </text:list-item>
      </text:list>
      <text:p text:style-name="Text_20_body">Estas variables se incluyen porque el comportamiento energético del aula no depende únicamente de las condiciones físicas, sino también del contexto temporal. Por ejemplo:</text:p>
      <text:list text:style-name="L61">
        <text:list-item>
          <text:p text:style-name="P126">la climatización puede variar según la hora </text:p>
        </text:list-item>
        <text:list-item>
          <text:p text:style-name="P126">el uso del aula puede ser distinto entre días laborables y fines de semana </text:p>
        </text:list-item>
        <text:list-item>
          <text:p text:style-name="P127">la temperatura exterior y el comportamiento térmico cambian según la estación del año </text:p>
        </text:list-item>
      </text:list>
      <text:h text:style-name="P29" text:outline-level="2"><text:span text:style-name="Strong_20_Emphasis"/></text:h>
      <text:h text:style-name="P29" text:outline-level="2"><text:span text:style-name="Strong_20_Emphasis">3. Incorporación de variables principales reconstruidas</text:span></text:h>
      <text:p text:style-name="Text_20_body">A continuación se integran las variables reconstruidas en fases anteriores:</text:p>
      <text:list text:style-name="L62">
        <text:list-item>
          <text:p text:style-name="P128"><text:span text:style-name="Source_20_Text"><text:span text:style-name="T7">temp_aula1</text:span></text:span><text:span text:style-name="T7"> </text:span></text:p>
        </text:list-item>
        <text:list-item>
          <text:p text:style-name="P128"><text:span text:style-name="Source_20_Text"><text:span text:style-name="T7">temp_aula2_completada</text:span></text:span><text:span text:style-name="T7"> </text:span></text:p>
        </text:list-item>
        <text:list-item>
          <text:p text:style-name="P128"><text:span text:style-name="Source_20_Text"><text:span text:style-name="T7">hum_aula1</text:span></text:span><text:span text:style-name="T7"> </text:span></text:p>
        </text:list-item>
        <text:list-item>
          <text:p text:style-name="P129"><text:span text:style-name="Source_20_Text"><text:span text:style-name="T7">hum_aula2_completada</text:span></text:span><text:span text:style-name="T7"> </text:span></text:p>
        </text:list-item>
      </text:list>
      <text:p text:style-name="Text_20_body">Estas variables representan el núcleo del comportamiento ambiental interno del aula y permiten disponer de medidas horarias continuas incluso cuando existen ausencias parciales en los datos originales.</text:p>
      <text:p text:style-name="Text_20_body"><text:soft-page-break/>La unión se realiza mediante el índice temporal, asegurando que todas las variables queden alineadas por hora.</text:p>
      <text:h text:style-name="P29" text:outline-level="2"><text:span text:style-name="Strong_20_Emphasis">4. Integración de sensores numéricos y variables externas</text:span></text:h>
      <text:p text:style-name="Text_20_body">Una vez definidas las variables principales, se incorporan el resto de señales numéricas disponibles en el histórico bruto <text:span text:style-name="T7">(</text:span><text:span text:style-name="Source_20_Text"><text:span text:style-name="T7">df_raw</text:span></text:span><text:span text:style-name="T7">).</text:span></text:p>
      <text:p text:style-name="Text_20_body">Para ello se realiza una tabla dinámica horaria <text:span text:style-name="T7">(</text:span><text:span text:style-name="Source_20_Text"><text:span text:style-name="T7">pivot_table</text:span></text:span><text:span text:style-name="T7">)</text:span> en la que:</text:p>
      <text:list text:style-name="L63">
        <text:list-item>
          <text:p text:style-name="P130">cada fila representa una hora </text:p>
        </text:list-item>
        <text:list-item>
          <text:p text:style-name="P130">cada columna representa un sensor o variable </text:p>
        </text:list-item>
        <text:list-item>
          <text:p text:style-name="P131">el valor asociado es la media horaria registrada </text:p>
        </text:list-item>
      </text:list>
      <text:p text:style-name="P45">pivot_table(index=pd.Grouper(key='time', freq='h'), ...)</text:p>
      <text:h text:style-name="P29" text:outline-level="2"><text:span text:style-name="Strong_20_Emphasis"/></text:h>
      <text:h text:style-name="P29" text:outline-level="2"><text:span text:style-name="Strong_20_Emphasis">5. Selección de variables de interés</text:span></text:h>
      <text:p text:style-name="Text_20_body">No se incorporan todas las columnas disponibles, sino únicamente aquellas que pueden aportar valor al modelo.<text:line-break/>La selección se realiza filtrando nombres de sensores o variables que contengan términos relacionados con:</text:p>
      <text:list text:style-name="L64">
        <text:list-item>
          <text:p text:style-name="P132">temperatura </text:p>
        </text:list-item>
        <text:list-item>
          <text:p text:style-name="P132">humedad </text:p>
        </text:list-item>
        <text:list-item>
          <text:p text:style-name="P132">presión </text:p>
        </text:list-item>
        <text:list-item>
          <text:p text:style-name="P132">nubosidad </text:p>
        </text:list-item>
        <text:list-item>
          <text:p text:style-name="P132">posición solar </text:p>
        </text:list-item>
        <text:list-item>
          <text:p text:style-name="P132">azimut </text:p>
        </text:list-item>
        <text:list-item>
          <text:p text:style-name="P132">elevación solar </text:p>
        </text:list-item>
        <text:list-item>
          <text:p text:style-name="P133">variables meteorológicas o exteriores </text:p>
        </text:list-item>
      </text:list>
      <text:p text:style-name="Text_20_body">En concreto, se consideran columnas cuyo identificador contiene términos como:</text:p>
      <text:list text:style-name="L65">
        <text:list-item>
          <text:p text:style-name="P134"><text:span text:style-name="Source_20_Text"><text:span text:style-name="T12">temperature</text:span></text:span><text:span text:style-name="T12"> </text:span></text:p>
        </text:list-item>
        <text:list-item>
          <text:p text:style-name="P134"><text:span text:style-name="Source_20_Text"><text:span text:style-name="T12">humidity</text:span></text:span><text:span text:style-name="T12"> </text:span></text:p>
        </text:list-item>
        <text:list-item>
          <text:p text:style-name="P134"><text:span text:style-name="Source_20_Text"><text:span text:style-name="T12">pressure</text:span></text:span><text:span text:style-name="T12"> </text:span></text:p>
        </text:list-item>
        <text:list-item>
          <text:p text:style-name="P134"><text:span text:style-name="Source_20_Text"><text:span text:style-name="T12">cloud</text:span></text:span><text:span text:style-name="T12"> </text:span></text:p>
        </text:list-item>
        <text:list-item>
          <text:p text:style-name="P134"><text:span text:style-name="Source_20_Text"><text:span text:style-name="T12">sun</text:span></text:span><text:span text:style-name="T12"> </text:span></text:p>
        </text:list-item>
        <text:list-item>
          <text:p text:style-name="P134"><text:span text:style-name="Source_20_Text"><text:span text:style-name="T12">elevation</text:span></text:span><text:span text:style-name="T12"> </text:span></text:p>
        </text:list-item>
        <text:list-item>
          <text:p text:style-name="P134"><text:span text:style-name="Source_20_Text"><text:span text:style-name="T12">azimuth</text:span></text:span><text:span text:style-name="T12"> </text:span></text:p>
        </text:list-item>
        <text:list-item>
          <text:p text:style-name="P134"><text:span text:style-name="Source_20_Text"><text:span text:style-name="T12">outdoor</text:span></text:span><text:span text:style-name="T12"> </text:span></text:p>
        </text:list-item>
        <text:list-item>
          <text:p text:style-name="P135"><text:span text:style-name="Source_20_Text"><text:span text:style-name="T12">weather</text:span></text:span><text:span text:style-name="T12"> </text:span></text:p>
        </text:list-item>
      </text:list>
      <text:p text:style-name="Text_20_body">Esta selección responde a un criterio funcional: incorporar únicamente variables con potencial capacidad explicativa sobre el comportamiento energético del aula.</text:p>
      <text:h text:style-name="P29" text:outline-level="2"><text:soft-page-break/><text:span text:style-name="Strong_20_Emphasis">6. Justificación metodológica</text:span></text:h>
      <text:p text:style-name="Text_20_body">Se opta por una estructura horaria unificada por varios motivos:</text:p>
      <text:h text:style-name="P60" text:outline-level="3"><text:span text:style-name="Strong_20_Emphasis">6.1 Coherencia con el enunciado</text:span></text:h>
      <text:p text:style-name="Text_20_body">El proyecto exige explícitamente trabajar con los datos agregados por horas, por lo que esta construcción se ajusta directamente a los requisitos planteados.</text:p>
      <text:h text:style-name="P60" text:outline-level="3"><text:span text:style-name="Strong_20_Emphasis">6.2 Reducción de ruido</text:span></text:h>
      <text:p text:style-name="Text_20_body">La agregación horaria suaviza oscilaciones puntuales y pequeñas variaciones instantáneas de los sensores, permitiendo trabajar con una señal más estable y representativa.</text:p>
      <text:h text:style-name="P60" text:outline-level="3"><text:span text:style-name="Strong_20_Emphasis">6.3 Preparación para modelado</text:span></text:h>
      <text:p text:style-name="Text_20_body">Los modelos de Machine Learning y redes neuronales requieren una estructura tabular consistente, con una fila por observación y columnas homogéneas.<text:line-break/>Este DataFrame cumple ese requisito y sirve como base para las siguientes transformaciones.</text:p>
      <text:h text:style-name="P60" text:outline-level="3"><text:span text:style-name="Strong_20_Emphasis">6.4 Integración de variables heterogéneas</text:span></text:h>
      <text:p text:style-name="Text_20_body">El aula combina información de distinta naturaleza:</text:p>
      <text:list text:style-name="L66">
        <text:list-item>
          <text:p text:style-name="P136">variables temporales </text:p>
        </text:list-item>
        <text:list-item>
          <text:p text:style-name="P136">variables internas reconstruidas </text:p>
        </text:list-item>
        <text:list-item>
          <text:p text:style-name="P136">sensores ambientales </text:p>
        </text:list-item>
        <text:list-item>
          <text:p text:style-name="P137">información exterior </text:p>
        </text:list-item>
      </text:list>
      <text:p text:style-name="Text_20_body">Centralizar todo en un único DataFrame facilita la trazabilidad y el análisis conjunto.</text:p>
      <text:h text:style-name="P29" text:outline-level="2"><text:span text:style-name="Strong_20_Emphasis"/></text:h>
      <text:h text:style-name="P29" text:outline-level="2"><text:span text:style-name="Strong_20_Emphasis">7. Resultado obtenido</text:span></text:h>
      <text:p text:style-name="Text_20_body">Como resultado se genera un <text:span text:style-name="Strong_20_Emphasis">DataFrame horario base</text:span> con:</text:p>
      <text:list text:style-name="L67">
        <text:list-item>
          <text:p text:style-name="P138"><text:span text:style-name="Strong_20_Emphasis">9433 filas</text:span> </text:p>
        </text:list-item>
        <text:list-item>
          <text:p text:style-name="P139"><text:span text:style-name="Strong_20_Emphasis">55 columnas</text:span> </text:p>
        </text:list-item>
      </text:list>
      <text:p text:style-name="Text_20_body">Cada fila representa una hora del periodo analizado y cada columna representa una característica potencialmente útil para el análisis y la predicción.</text:p>
      <text:p text:style-name="Text_20_body">Los primeros registros muestran que ya se dispone, desde esta fase, de una estructura completa con:</text:p>
      <text:list text:style-name="L68">
        <text:list-item>
          <text:p text:style-name="P140">variables temporales </text:p>
        </text:list-item>
        <text:list-item>
          <text:p text:style-name="P140">temperatura y humedad de ambas aulas </text:p>
        </text:list-item>
        <text:list-item>
          <text:p text:style-name="P141">variables adicionales de sensores </text:p>
        </text:list-item>
      </text:list>
      <text:p text:style-name="Text_20_body"><text:span text:style-name="Strong_20_Emphasis"/></text:p>
      <text:p text:style-name="Text_20_body"><text:span text:style-name="Strong_20_Emphasis"/></text:p>
      <text:h text:style-name="P29" text:outline-level="2"><text:soft-page-break/><text:span text:style-name="Strong_20_Emphasis">8. Importancia dentro del pipeline</text:span></text:h>
      <text:p text:style-name="Text_20_body">Este DataFrame no es todavía el dataset final del modelo, pero sí constituye la <text:span text:style-name="Strong_20_Emphasis">capa base de integración</text:span> sobre la que se construyen las siguientes etapas del pipeline.</text:p>
      <text:p text:style-name="Text_20_body">A partir de él se podrán generar nuevas variables derivadas, como por ejemplo:</text:p>
      <text:list text:style-name="L69">
        <text:list-item>
          <text:p text:style-name="P142">indicadores del estado de calefacción </text:p>
        </text:list-item>
        <text:list-item>
          <text:p text:style-name="P142">minutos de apertura </text:p>
        </text:list-item>
        <text:list-item>
          <text:p text:style-name="P142">variables de derroche </text:p>
        </text:list-item>
        <text:list-item>
          <text:p text:style-name="P143">target desplazado a la siguiente hora </text:p>
        </text:list-item>
      </text:list>
      <text:h text:style-name="P29" text:outline-level="2"><text:span text:style-name="Strong_20_Emphasis"/></text:h>
      <text:h text:style-name="P29" text:outline-level="2"><text:span text:style-name="Strong_20_Emphasis">9. Conclusión</text:span></text:h>
      <text:p text:style-name="Text_20_body">La construcción del DataFrame horario base permite consolidar en una sola estructura toda la información relevante del proyecto, con granularidad horaria y alineación temporal coherente.</text:p>
      <text:p text:style-name="Text_20_body">Este paso es fundamental porque establece la base sobre la que se desarrollará el resto del flujo analítico y predictivo, garantizando que las siguientes fases se apoyen en un dataset consistente, interpretable y preparado para modelado.</text:p>
      <text:p text:style-name="Text_20_body"/>
      <text:p text:style-name="Text_20_body"><draw:frame draw:style-name="fr4" draw:name="Imagen6" text:anchor-type="char" svg:width="16.447cm" svg:height="7.472cm" draw:z-index="5"><draw:image xlink:href="Pictures/1000000100000309000001617F865A6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8" text:outline-level="1"><text:soft-page-break/><text:span text:style-name="Strong_20_Emphasis">Cálculo del estado de la calefacción</text:span></text:h>
      <text:h text:style-name="P29" text:outline-level="2"><text:span text:style-name="Strong_20_Emphasis">1. Contexto y origen de la lógica</text:span></text:h>
      <text:p text:style-name="Text_20_body">Para poder detectar situaciones de derroche energético, es imprescindible conocer si el sistema de climatización <text:s/>está en funcionamiento en cada momento.</text:p>
      <text:p text:style-name="Text_20_body">Sin embargo, esta información no estaba disponible directamente en el dataset inicial.<text:line-break/>Posteriormente, se facilitó una descripción del comportamiento del sistema de calefacción, basada en reglas de funcionamiento dependientes de la temperatura y del horario.</text:p>
      <text:p text:style-name="Text_20_body">A partir de estas reglas se ha construido un modelo determinista que permite inferir el estado de la calefacción en cada hora.</text:p>
      <text:h text:style-name="P29" text:outline-level="2"><text:span text:style-name="Strong_20_Emphasis"/></text:h>
      <text:h text:style-name="P29" text:outline-level="2"><text:span text:style-name="Strong_20_Emphasis">2. Planteamiento del modelo</text:span></text:h>
      <text:p text:style-name="Text_20_body">Se define una función que determina si la calefacción está encendida (<text:span text:style-name="Source_20_Text">1</text:span>) o apagada (<text:span text:style-name="Source_20_Text">0</text:span>) en función de:</text:p>
      <text:list text:style-name="L70">
        <text:list-item>
          <text:p text:style-name="P144">la temperatura del aula (Aula 2 reconstruida)</text:p>
        </text:list-item>
        <text:list-item>
          <text:p text:style-name="P144">la hora del día</text:p>
        </text:list-item>
        <text:list-item>
          <text:p text:style-name="P144">el día de la semana</text:p>
        </text:list-item>
      </text:list>
      <text:p text:style-name="Text_20_body">Este enfoque permite simular el comportamiento real del sistema de climatización.</text:p>
      <text:h text:style-name="P29" text:outline-level="2"><text:span text:style-name="Strong_20_Emphasis">3. Reglas de funcionamiento de la calefacción</text:span></text:h>
      <text:h text:style-name="P60" text:outline-level="3"><text:span text:style-name="Strong_20_Emphasis">3.1 Restricción por día</text:span></text:h>
      <text:p text:style-name="Text_20_body">La calefacción solo puede activarse en días laborables:</text:p>
      <text:list text:style-name="L71">
        <text:list-item>
          <text:p text:style-name="P145">Lunes a viernes → posible encendido</text:p>
        </text:list-item>
        <text:list-item>
          <text:p text:style-name="P145">Sábados y domingos → calefacción apagada</text:p>
        </text:list-item>
      </text:list>
      <text:p text:style-name="P36"><text:span text:style-name="Source_20_Text"><text:span text:style-name="T7">if dt.weekday() &gt; 4:</text:span></text:span></text:p>
      <text:p text:style-name="P36"><text:span text:style-name="Source_20_Text"><text:span text:style-name="T7"><text:s text:c="4"/>return 0</text:span></text:span></text:p>
      <text:h text:style-name="P60" text:outline-level="3"><text:span text:style-name="Strong_20_Emphasis">3.2 Franjas horarias de funcionamiento</text:span></text:h>
      <text:p text:style-name="Text_20_body">Se definen varias franjas horarias en las que la calefacción puede activarse:</text:p>
      <text:list text:style-name="L72">
        <text:list-item>
          <text:p text:style-name="P146"><text:span text:style-name="Strong_20_Emphasis">07:00 – 11:00</text:span></text:p>
        </text:list-item>
        <text:list-item>
          <text:p text:style-name="P146"><text:span text:style-name="Strong_20_Emphasis">11:00 – 16:00</text:span></text:p>
        </text:list-item>
        <text:list-item>
          <text:p text:style-name="P146"><text:span text:style-name="Strong_20_Emphasis">18:00 – 21:00</text:span></text:p>
        </text:list-item>
      </text:list>
      <text:p text:style-name="Text_20_body">En estas franjas, la calefacción se enciende si:</text:p>
      <text:p text:style-name="P61">temperatura &lt; <text:span text:style-name="Strong_20_Emphasis">21.95 °C</text:span></text:p>
      <text:h text:style-name="P60" text:outline-level="3"><text:soft-page-break/><text:span text:style-name="Strong_20_Emphasis">3.3 Franja con umbral diferenciado</text:span></text:h>
      <text:p text:style-name="Text_20_body">En el intervalo:</text:p>
      <text:list text:style-name="L73">
        <text:list-item>
          <text:p text:style-name="P147"><text:span text:style-name="Strong_20_Emphasis">16:00 – 18:00</text:span></text:p>
        </text:list-item>
      </text:list>
      <text:p text:style-name="Text_20_body">se aplica un umbral ligeramente inferior:</text:p>
      <text:p text:style-name="P61">temperatura &lt; <text:span text:style-name="Strong_20_Emphasis">21.55 °C</text:span></text:p>
      <text:p text:style-name="Text_20_body">Esto refleja un comportamiento más conservador del sistema en esa franja.</text:p>
      <text:h text:style-name="P60" text:outline-level="3"><text:span text:style-name="Strong_20_Emphasis">3.4 Resto de horas</text:span></text:h>
      <text:p text:style-name="Text_20_body">Fuera de estas franjas horarias:</text:p>
      <text:list text:style-name="L74">
        <text:list-item>
          <text:p text:style-name="P148">la calefacción permanece apagada</text:p>
        </text:list-item>
      </text:list>
      <text:h text:style-name="P29" text:outline-level="2"><text:span text:style-name="Strong_20_Emphasis"/></text:h>
      <text:h text:style-name="P29" text:outline-level="2"><text:span text:style-name="Strong_20_Emphasis">4. Aplicación del modelo</text:span></text:h>
      <text:p text:style-name="Text_20_body">La función definida se aplica a cada fila del DataFrame horario:</text:p>
      <text:p text:style-name="P36"><text:span text:style-name="Source_20_Text"><text:span text:style-name="T7">df_base_horaria.apply(calcular_calefaccion_on, axis=1)</text:span></text:span></text:p>
      <text:p text:style-name="Text_20_body">Como resultado, se genera la variable:</text:p>
      <text:p text:style-name="P61"><text:span text:style-name="Strong_20_Emphasis"><text:span text:style-name="Source_20_Text">calefaccion_actual</text:span></text:span></text:p>
      <text:list text:style-name="L75">
        <text:list-item>
          <text:p text:style-name="P149">1 → calefacción encendida</text:p>
        </text:list-item>
        <text:list-item>
          <text:p text:style-name="P149">0 → calefacción apagada</text:p>
        </text:list-item>
      </text:list>
      <text:h text:style-name="P29" text:outline-level="2"><text:span text:style-name="Strong_20_Emphasis"/></text:h>
      <text:h text:style-name="P29" text:outline-level="2"><text:span text:style-name="Strong_20_Emphasis">5. Resultados obtenidos</text:span></text:h>
      <text:p text:style-name="Text_20_body">Se obtiene:</text:p>
      <text:p text:style-name="P61"><text:span text:style-name="Strong_20_Emphasis">1352 horas con calefacción encendida</text:span></text:p>
      <text:p text:style-name="Text_20_body">En la muestra de datos se observa que:</text:p>
      <text:list text:style-name="L76">
        <text:list-item>
          <text:p text:style-name="P150">la calefacción se activa cuando la temperatura cae por debajo del umbral</text:p>
        </text:list-item>
        <text:list-item>
          <text:p text:style-name="P150">se desactiva cuando la temperatura supera dicho valor</text:p>
        </text:list-item>
        <text:list-item>
          <text:p text:style-name="P150">el comportamiento sigue un patrón consistente con las reglas definidas</text:p>
        </text:list-item>
      </text:list>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6. Justificación técnica</text:span></text:h>
      <text:p text:style-name="Text_20_body">El uso de un modelo basado en reglas presenta varias ventajas:</text:p>
      <text:h text:style-name="P60" text:outline-level="3"><text:span text:style-name="Strong_20_Emphasis">6.1 Interpretabilidad</text:span></text:h>
      <text:p text:style-name="Text_20_body">El modelo es completamente transparente y permite entender claramente por qué la calefacción está encendida o apagada en cada momento.</text:p>
      <text:h text:style-name="P60" text:outline-level="3"><text:span text:style-name="Strong_20_Emphasis">6.2 Coherencia con el sistema real</text:span></text:h>
      <text:p text:style-name="Text_20_body">Las reglas reflejan el comportamiento operativo real del sistema de climatización, lo que aporta realismo al dataset.</text:p>
      <text:h text:style-name="P60" text:outline-level="3"><text:span text:style-name="Strong_20_Emphasis">6.3 Necesidad para el proyecto</text:span></text:h>
      <text:p text:style-name="Text_20_body">La variable “calefacción encendida” es fundamental para:</text:p>
      <text:list text:style-name="L77">
        <text:list-item>
          <text:p text:style-name="P151">definir el derroche energético</text:p>
        </text:list-item>
        <text:list-item>
          <text:p text:style-name="P151">construir el target del modelo</text:p>
        </text:list-item>
        <text:list-item>
          <text:p text:style-name="P151">entrenar el sistema de predicción</text:p>
        </text:list-item>
      </text:list>
      <text:h text:style-name="P29" text:outline-level="2"><text:span text:style-name="Strong_20_Emphasis"/></text:h>
      <text:h text:style-name="P29" text:outline-level="2"><text:span text:style-name="Strong_20_Emphasis">7. Limitaciones</text:span></text:h>
      <text:p text:style-name="Text_20_body">Este enfoque presenta ciertas limitaciones:</text:p>
      <text:list text:style-name="L78">
        <text:list-item>
          <text:p text:style-name="P152">no contempla variaciones dinámicas del sistema real</text:p>
        </text:list-item>
        <text:list-item>
          <text:p text:style-name="P152">asume umbrales fijos</text:p>
        </text:list-item>
        <text:list-item>
          <text:p text:style-name="P152">no incluye factores externos adicionales (ocupación, inercia térmica, etc.)</text:p>
        </text:list-item>
      </text:list>
      <text:p text:style-name="Text_20_body">No obstante, resulta adecuado para el objetivo del proyecto.</text:p>
      <text:h text:style-name="P29" text:outline-level="2"><text:span text:style-name="Strong_20_Emphasis"/></text:h>
      <text:h text:style-name="P29" text:outline-level="2"><text:span text:style-name="Strong_20_Emphasis">8. Resultado generado</text:span></text:h>
      <text:p text:style-name="Text_20_body">Se genera el archivo:</text:p>
      <text:p text:style-name="P61"><text:span text:style-name="Source_20_Text"><text:span text:style-name="T7">RESULTADO_CON_CALEFACCION.csv</text:span></text:span></text:p>
      <text:p text:style-name="Text_20_body">que incorpora la nueva variable <text:span text:style-name="Source_20_Text"><text:span text:style-name="T7">calefaccion_actual</text:span></text:span><text:span text:style-name="T7"> </text:span>al dataset horario.</text:p>
      <text:h text:style-name="P29" text:outline-level="2"><text:span text:style-name="Strong_20_Emphasis"/></text:h>
      <text:p text:style-name="P43"><text:span text:style-name="Strong_20_Emphasis"/></text:p>
      <text:p text:style-name="P43"><text:span text:style-name="Strong_20_Emphasis"/></text:p>
      <text:h text:style-name="P29" text:outline-level="2"><text:soft-page-break/><text:span text:style-name="Strong_20_Emphasis">9. Conclusión</text:span></text:h>
      <text:p text:style-name="Text_20_body">Se ha construido un modelo determinista que permite inferir el estado de la calefacción a partir de la temperatura y el contexto temporal.</text:p>
      <text:p text:style-name="Text_20_body">Esta variable constituye un elemento clave en el proyecto, ya que permite identificar situaciones potenciales de ineficiencia energética y es imprescindible para la definición del indicador de derroche.</text:p>
      <text:p text:style-name="P153">La variable ‘calefacción_actual’ no es un dato medido directamente, sino una variable derivada mediante modelado basado en reglas, lo que la convierte en una feature sintética construida a partir del conocimiento del dominio.</text:p>
      <text:p text:style-name="P153"><draw:frame draw:style-name="fr2" draw:name="Imagen7" text:anchor-type="char" svg:width="13.919cm" svg:height="17.782cm" draw:z-index="6"><draw:image xlink:href="Pictures/100000010000020E000002A0589E5170.png" xlink:type="simple" xlink:show="embed" xlink:actuate="onLoad" draw:mime-type="image/png"/></draw:frame></text:p>
      <text:p text:style-name="Text_20_body"/>
      <text:h text:style-name="P28" text:outline-level="1"><text:soft-page-break/><text:span text:style-name="Strong_20_Emphasis">Cálculo del índice de aperturas ponderadas</text:span></text:h>
      <text:h text:style-name="P29" text:outline-level="2"><text:span text:style-name="Strong_20_Emphasis">1. Objetivo</text:span></text:h>
      <text:p text:style-name="Text_20_body">El objetivo de esta fase es transformar los eventos de apertura y cierre de puertas y ventanas en una variable numérica horaria que refleje el impacto real de las aperturas sobre la eficiencia energética del aula.</text:p>
      <text:p text:style-name="Text_20_body">Dado que no todas las aperturas tienen la misma relevancia, se construye un <text:span text:style-name="Strong_20_Emphasis"><text:span text:style-name="T6">índice ponderado de apertura</text:span></text:span>, capaz de integrar en una sola medida:</text:p>
      <text:list text:style-name="L79">
        <text:list-item>
          <text:p text:style-name="P154">qué elemento se abre </text:p>
        </text:list-item>
        <text:list-item>
          <text:p text:style-name="P154">cuánto tiempo permanece abierto </text:p>
        </text:list-item>
        <text:list-item>
          <text:p text:style-name="P155">qué peso relativo tiene en la pérdida energética </text:p>
        </text:list-item>
      </text:list>
      <text:p text:style-name="Text_20_body">Esta variable será fundamental para definir posteriormente si existe o no situación de derroche.</text:p>
      <text:h text:style-name="P29" text:outline-level="2"><text:span text:style-name="Strong_20_Emphasis"/></text:h>
      <text:h text:style-name="P29" text:outline-level="2"><text:span text:style-name="Strong_20_Emphasis">2. Detección de sensores de contacto</text:span></text:h>
      <text:p text:style-name="Text_20_body">En primer lugar, se identifican automáticamente los sensores de contacto presentes en el dataset bruto <text:span text:style-name="T7">(</text:span><text:span text:style-name="Source_20_Text"><text:span text:style-name="T7">df_raw</text:span></text:span><text:span text:style-name="T7">).</text:span></text:p>
      <text:p text:style-name="Text_20_body">Se seleccionan únicamente aquellos sensores cuyo identificador contiene términos relacionados con:</text:p>
      <text:list text:style-name="L80">
        <text:list-item>
          <text:p text:style-name="P156"><text:span text:style-name="Source_20_Text"><text:span text:style-name="T7">contact</text:span></text:span><text:span text:style-name="T7"> </text:span></text:p>
        </text:list-item>
        <text:list-item>
          <text:p text:style-name="P156"><text:span text:style-name="Source_20_Text"><text:span text:style-name="T7">puerta</text:span></text:span><text:span text:style-name="T7"> </text:span></text:p>
        </text:list-item>
        <text:list-item>
          <text:p text:style-name="P157"><text:span text:style-name="Source_20_Text"><text:span text:style-name="T7">ventana</text:span></text:span><text:span text:style-name="T7"> </text:span></text:p>
        </text:list-item>
      </text:list>
      <text:p text:style-name="Text_20_body">y se excluyen señales no válidas para este cálculo, como:</text:p>
      <text:list text:style-name="L81">
        <text:list-item>
          <text:p text:style-name="P158">temperaturas </text:p>
        </text:list-item>
        <text:list-item>
          <text:p text:style-name="P158">batería </text:p>
        </text:list-item>
        <text:list-item>
          <text:p text:style-name="P159">temperatura interna de dispositivos <text:span text:style-name="T7">(</text:span><text:span text:style-name="Source_20_Text"><text:span text:style-name="T7">device</text:span></text:span><text:span text:style-name="T7">) </text:span></text:p>
        </text:list-item>
      </text:list>
      <text:p text:style-name="Text_20_body">De este modo, se aíslan exclusivamente los sensores que informan sobre el estado de apertura/cierre de elementos físicos del aula.</text:p>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3. Conversión del estado de apertura</text:span></text:h>
      <text:p text:style-name="Text_20_body">Los estados originales de los sensores se transforman en una variable binaria:</text:p>
      <text:list text:style-name="L82">
        <text:list-item>
          <text:p text:style-name="P160"><text:span text:style-name="Source_20_Text">1</text:span> → abierto </text:p>
        </text:list-item>
        <text:list-item>
          <text:p text:style-name="P161"><text:span text:style-name="Source_20_Text">0</text:span> → cerrado </text:p>
        </text:list-item>
      </text:list>
      <text:p text:style-name="Text_20_body"/>
      <text:p text:style-name="Text_20_body"/>
      <text:p text:style-name="Text_20_body">Para ello se mapean distintos posibles valores textuales del histórico:</text:p>
      <text:list text:style-name="L83">
        <text:list-item>
          <text:p text:style-name="P162"><text:span text:style-name="Source_20_Text"><text:span text:style-name="T7">on</text:span></text:span><text:span text:style-name="T7">, </text:span><text:span text:style-name="Source_20_Text"><text:span text:style-name="T7">open</text:span></text:span><text:span text:style-name="T7"> → 1 </text:span></text:p>
        </text:list-item>
        <text:list-item>
          <text:p text:style-name="P163"><text:span text:style-name="Source_20_Text"><text:span text:style-name="T7">off</text:span></text:span><text:span text:style-name="T7">, </text:span><text:span text:style-name="Source_20_Text"><text:span text:style-name="T7">closed</text:span></text:span><text:span text:style-name="T7"> → 0 </text:span></text:p>
        </text:list-item>
      </text:list>
      <text:p text:style-name="Text_20_body">Los valores no reconocidos se completan como 0 para evitar errores en el procesamiento.</text:p>
      <text:p text:style-name="Text_20_body">Esta transformación permite pasar de una señal textual heterogénea a una estructura homogénea y operativa para cálculo.</text:p>
      <text:h text:style-name="P29" text:outline-level="2"><text:span text:style-name="Strong_20_Emphasis"/></text:h>
      <text:h text:style-name="P29" text:outline-level="2"><text:span text:style-name="Strong_20_Emphasis">4. Reconstrucción minuto a minuto</text:span></text:h>
      <text:p text:style-name="Text_20_body">Los datos de contacto no siempre están registrados con periodicidad fija, ya que normalmente solo generan eventos cuando cambia el estado del sensor.</text:p>
      <text:p text:style-name="Text_20_body"><text:span text:style-name="T13">Para poder estimar el teimpo total de apertura, se sigue este proceso</text:span>:</text:p>
      <text:list text:style-name="L84">
        <text:list-item>
          <text:p text:style-name="P164">Crear una tabla con una columna por sensor </text:p>
        </text:list-item>
        <text:list-item>
          <text:p text:style-name="P164">Reindexar temporalmente a resolución de 1 minuto </text:p>
        </text:list-item>
        <text:list-item>
          <text:p text:style-name="P165">Propagar el último valor conocido <text:span text:style-name="T7">(</text:span><text:span text:style-name="Source_20_Text"><text:span text:style-name="T7">forward fill</text:span></text:span><text:span text:style-name="T7">)</text:span> con un límite de 60 minutos </text:p>
        </text:list-item>
      </text:list>
      <text:p text:style-name="Text_20_body">Esto permite estimar, para cada minuto, qué sensores permanecían abiertos o cerrados.</text:p>
      <text:p text:style-name="Text_20_body">La limitación de propagación a 60 minutos se introduce como medida de prudencia, evitando mantener artificialmente un estado indefinidamente cuando no existen nuevas lecturas.</text:p>
      <text:h text:style-name="P29" text:outline-level="2"><text:span text:style-name="Strong_20_Emphasis">5. Ponderación de aperturas</text:span></text:h>
      <text:p text:style-name="Text_20_body">Una vez reconstruido el estado minuto a minuto, se asigna un peso a cada tipo de apertura en función de su impacto relativo en la pérdida energética.</text:p>
      <text:p text:style-name="Text_20_body">En la implementación realizada se utiliza la siguiente ponderación:</text:p>
      <text:list text:style-name="L85">
        <text:list-item>
          <text:p text:style-name="P166"><text:span text:style-name="Strong_20_Emphasis">Ventana superior / pequeña</text:span> → 1 </text:p>
        </text:list-item>
        <text:list-item>
          <text:p text:style-name="P166"><text:span text:style-name="Strong_20_Emphasis">Ventana inferior / grande</text:span> → 2 </text:p>
        </text:list-item>
        <text:list-item>
          <text:p text:style-name="P167"><text:span text:style-name="Strong_20_Emphasis">Puerta</text:span> → 4 </text:p>
        </text:list-item>
      </text:list>
      <text:p text:style-name="Text_20_body">Por tanto, cada minuto abierto de cada sensor no suma simplemente 1, sino su peso correspondiente.</text:p>
      <text:p text:style-name="Text_20_body">Esto permite que el índice final refleje de manera más realista la magnitud de la apertura.</text:p>
      <text:h text:style-name="P29" text:outline-level="2"><text:soft-page-break/><text:span text:style-name="Strong_20_Emphasis">6. Construcción del índice horario</text:span></text:h>
      <text:p text:style-name="Text_20_body">Tras ponderar cada sensor, se suman los valores por minuto y posteriormente se agregan por hora.</text:p>
      <text:p text:style-name="Text_20_body">El resultado es una nueva variable:</text:p>
      <text:p text:style-name="P61"><text:span text:style-name="Strong_20_Emphasis"><text:span text:style-name="Source_20_Text"><text:span text:style-name="T7">indice_apertura_ponderado</text:span></text:span></text:span></text:p>
      <text:p text:style-name="Text_20_body">Esta variable representa la suma acumulada de apertura ponderada durante cada hora.</text:p>
      <text:p text:style-name="Text_20_body">En otras palabras, mide cuánta “apertura efectiva” se ha producido en una hora, teniendo en cuenta tanto el tiempo abierto como la importancia relativa del elemento.</text:p>
      <text:h text:style-name="P29" text:outline-level="2"><text:span text:style-name="Strong_20_Emphasis"/></text:h>
      <text:h text:style-name="P29" text:outline-level="2"><text:span text:style-name="Strong_20_Emphasis">7. Integración en el DataFrame base</text:span></text:h>
      <text:p text:style-name="Text_20_body">El índice horario calculado se incorpora al DataFrame principal mediante unión por índice temporal.</text:p>
      <text:p text:style-name="Text_20_body">Además, las horas sin actividad de apertura se completan con valor 0, de forma que:</text:p>
      <text:list text:style-name="L86">
        <text:list-item>
          <text:p text:style-name="P168">un valor 0 indica ausencia de aperturas relevantes </text:p>
        </text:list-item>
        <text:list-item>
          <text:p text:style-name="P169">valores superiores indican actividad de apertura acumulada </text:p>
        </text:list-item>
      </text:list>
      <text:p text:style-name="Text_20_body">En la muestra mostrada, los primeros registros presentan valor 0, lo que indica que en esas horas iniciales no se detectaron aperturas ponderadas.</text:p>
      <text:h text:style-name="P29" text:outline-level="2"><text:span text:style-name="Strong_20_Emphasis"/></text:h>
      <text:h text:style-name="P29" text:outline-level="2"><text:span text:style-name="Strong_20_Emphasis">8. Justificación técnica</text:span></text:h>
      <text:p text:style-name="Text_20_body">Este enfoque presenta varias ventajas:</text:p>
      <text:h text:style-name="P60" text:outline-level="3"><text:span text:style-name="Strong_20_Emphasis">8.1 Representa mejor la realidad</text:span></text:h>
      <text:p text:style-name="Text_20_body">No todas las aperturas tienen el mismo efecto sobre la pérdida energética. Una puerta abierta tiene más impacto que una ventana pequeña, por lo que el uso de pesos mejora el realismo del modelo.</text:p>
      <text:h text:style-name="P60" text:outline-level="3"><text:span text:style-name="Strong_20_Emphasis">8.2 Permite medir duración</text:span></text:h>
      <text:p text:style-name="Text_20_body">No se contabiliza únicamente si hubo apertura o no, sino cuánto tiempo permaneció abierta.</text:p>
      <text:h text:style-name="P60" text:outline-level="3"><text:span text:style-name="Strong_20_Emphasis">8.3 Facilita la definición del derroche</text:span></text:h>
      <text:p text:style-name="Text_20_body">El índice obtenido puede compararse con un umbral para decidir si una situación es compatible con uso normal o con derroche energético.</text:p>
      <text:h text:style-name="P60" text:outline-level="3"><text:span text:style-name="Strong_20_Emphasis">8.4 Integra múltiples sensores en una sola variable</text:span></text:h>
      <text:p text:style-name="Text_20_body">En lugar de trabajar con cada apertura por separado, se sintetiza toda la información en una medida única y más interpretable.</text:p>
      <text:h text:style-name="P29" text:outline-level="2"><text:soft-page-break/><text:span text:style-name="Strong_20_Emphasis">9. Limitaciones</text:span></text:h>
      <text:p text:style-name="Text_20_body">Este método depende de la calidad del etiquetado de los sensores y de la correcta identificación del tipo de apertura a partir del nombre de la columna.</text:p>
      <text:p text:style-name="Text_20_body">Además, al reconstruirse la apertura minuto a minuto mediante propagación temporal, se asume que el último estado conocido se mantiene hasta que se detecta un cambio o hasta el límite establecido.</text:p>
      <text:p text:style-name="Text_20_body">Aun así, esta aproximación es razonable y adecuada para el objetivo del proyecto.</text:p>
      <text:h text:style-name="P29" text:outline-level="2"><text:span text:style-name="Strong_20_Emphasis"/></text:h>
      <text:h text:style-name="P29" text:outline-level="2"><text:span text:style-name="Strong_20_Emphasis">10. Conclusión</text:span></text:h>
      <text:p text:style-name="Text_20_body">Se ha construido una variable horaria denominada <text:span text:style-name="Source_20_Text"><text:span text:style-name="T7">indice_apertura_ponderado</text:span></text:span> que resume de forma cuantitativa el efecto acumulado de aperturas de puertas y ventanas en el aula.</text:p>
      <text:p text:style-name="Text_20_body">Esta variable constituye la base para la definición operativa del derroche energético y permite enlazar de forma directa la información de los sensores de contacto con el target del modelo.</text:p>
      <text:p text:style-name="Text_20_body"/>
      <text:h text:style-name="P28" text:outline-level="1"><text:span text:style-name="Strong_20_Emphasis">Cálculo del derroche energético actual</text:span></text:h>
      <text:h text:style-name="P29" text:outline-level="2"><text:span text:style-name="Strong_20_Emphasis">1. Objetivo</text:span></text:h>
      <text:p text:style-name="Text_20_body">El objetivo de esta fase es definir de forma operativa cuándo una hora concreta debe considerarse una situación de derroche energético.</text:p>
      <text:p text:style-name="Text_20_body">Para ello se combinan dos condiciones que, de forma conjunta, representan una pérdida de eficiencia:</text:p>
      <text:list text:style-name="L87">
        <text:list-item>
          <text:p text:style-name="P170">que la calefacción esté encendida </text:p>
        </text:list-item>
        <text:list-item>
          <text:p text:style-name="P171">que exista una apertura ponderada suficiente de puertas o ventanas </text:p>
        </text:list-item>
      </text:list>
      <text:p text:style-name="Text_20_body">Solo cuando ambas condiciones se cumplen simultáneamente se considera que existe derroche.</text:p>
      <text:h text:style-name="P29" text:outline-level="2"><text:span text:style-name="Strong_20_Emphasis"/></text:h>
      <text:h text:style-name="P29" text:outline-level="2"><text:span text:style-name="Strong_20_Emphasis">2. Definición del criterio de derroche</text:span></text:h>
      <text:p text:style-name="Text_20_body">Se establece un umbral de apertura ponderada:</text:p>
      <text:p text:style-name="P61"><text:span text:style-name="Strong_20_Emphasis">UMBRAL_DERROCHE = 20</text:span></text:p>
      <text:p text:style-name="Text_20_body">A partir de este valor, la variable <text:span text:style-name="Source_20_Text">hay_derroche</text:span> se calcula como binaria:</text:p>
      <text:list text:style-name="L88">
        <text:list-item>
          <text:p text:style-name="P172"><text:span text:style-name="Strong_20_Emphasis">1</text:span> → hay derroche </text:p>
        </text:list-item>
        <text:list-item>
          <text:p text:style-name="P173"><text:span text:style-name="Strong_20_Emphasis">0</text:span> → no hay derroche </text:p>
        </text:list-item>
      </text:list>
      <text:p text:style-name="Text_20_body">Formalmente:</text:p>
      <text:p text:style-name="P174">Se considera derroche cuando la calefacción está encendida y el índice de apertura ponderado es mayor o igual que el umbral establecido. </text:p>
      <text:p text:style-name="P174"><text:soft-page-break/>Esto se implementa mediante la condición: </text:p>
      <text:p text:style-name="P175">(df_base_horaria['calefaccion_actual'] == 1) &amp;</text:p>
      <text:p text:style-name="P176"><text:span text:style-name="Strong_20_Emphasis"><text:span text:style-name="T14">(df_base_horaria['indice_apertura_ponderado'] &gt;= UMBRAL_DERROCHE)</text:span></text:span></text:p>
      <text:p text:style-name="P176"><text:span text:style-name="Strong_20_Emphasis"/></text:p>
      <text:h text:style-name="P29" text:outline-level="2"><text:span text:style-name="Strong_20_Emphasis">3. Interpretación de la variable</text:span></text:h>
      <text:p text:style-name="Text_20_body">La variable <text:span text:style-name="Source_20_Text"><text:span text:style-name="T7">hay_derroche</text:span></text:span> representa una situación de ineficiencia energética en la hora actual.</text:p>
      <text:p text:style-name="Text_20_body">Su construcción combina:</text:p>
      <text:list text:style-name="L89">
        <text:list-item>
          <text:p text:style-name="P177">una <text:span text:style-name="Strong_20_Emphasis">variable derivada de contexto térmico</text:span> <text:span text:style-name="T7">(</text:span><text:span text:style-name="Source_20_Text"><text:span text:style-name="T7">calefaccion_actual</text:span></text:span><text:span text:style-name="T7">)</text:span> </text:p>
        </text:list-item>
        <text:list-item>
          <text:p text:style-name="P178">una <text:span text:style-name="Strong_20_Emphasis">variable derivada de comportamiento físico del aula</text:span> <text:span text:style-name="T7">(</text:span><text:span text:style-name="Source_20_Text"><text:span text:style-name="T7">indice_apertura_ponderado</text:span></text:span><text:span text:style-name="T7">) </text:span></text:p>
        </text:list-item>
      </text:list>
      <text:p text:style-name="Text_20_body">De esta forma, el derroche no se define únicamente por la existencia de aperturas ni únicamente por el estado de la calefacción, sino por la coincidencia de ambas circunstancias.</text:p>
      <text:h text:style-name="P29" text:outline-level="2"><text:span text:style-name="Strong_20_Emphasis"/></text:h>
      <text:h text:style-name="P29" text:outline-level="2"><text:span text:style-name="Strong_20_Emphasis">4. Resultado obtenido</text:span></text:h>
      <text:p text:style-name="Text_20_body">Tras aplicar la condición definida, se obtiene:</text:p>
      <text:p text:style-name="P61"><text:span text:style-name="Strong_20_Emphasis">Horas con derroche detectado: 367</text:span></text:p>
      <text:p text:style-name="Text_20_body">Además, el dataset se guarda en el archivo:</text:p>
      <text:p text:style-name="P61"><text:span text:style-name="Source_20_Text"><text:span text:style-name="T7">DATASET_CON_DERROCHE_ACTUAL.csv</text:span></text:span></text:p>
      <text:p text:style-name="Text_20_body">Este archivo ya incorpora la variable <text:span text:style-name="Source_20_Text">hay_derroche</text:span>, que constituye la base a partir de la cual se construirá posteriormente el target desplazado a la hora siguiente.</text:p>
      <text:h text:style-name="P29" text:outline-level="2"><text:span text:style-name="Strong_20_Emphasis"/></text:h>
      <text:h text:style-name="P29" text:outline-level="2"><text:span text:style-name="Strong_20_Emphasis">5. Validación inicial de resultados</text:span></text:h>
      <text:p text:style-name="Text_20_body">En la muestra mostrada se observa que:</text:p>
      <text:list text:style-name="L90">
        <text:list-item>
          <text:p text:style-name="P179">cuando <text:span text:style-name="Source_20_Text"><text:span text:style-name="T7">calefaccion_actual = 0</text:span></text:span><text:span text:style-name="T7">,</text:span> no se detecta derroche </text:p>
        </text:list-item>
        <text:list-item>
          <text:p text:style-name="P179">cuando <text:span text:style-name="Source_20_Text"><text:span text:style-name="T7">indice_apertura_ponderado = 0</text:span></text:span><text:span text:style-name="T7">,</text:span> tampoco se detecta derroche </text:p>
        </text:list-item>
        <text:list-item>
          <text:p text:style-name="P180">solo las horas que combinan calefacción activa y suficiente apertura ponderada pueden ser clasificadas como derroche </text:p>
        </text:list-item>
      </text:list>
      <text:p text:style-name="Text_20_body">Esto confirma que la lógica implementada es coherente con la definición conceptual del problema.</text:p>
      <text:h text:style-name="P29" text:outline-level="2"><text:span text:style-name="Strong_20_Emphasis"/></text:h>
      <text:p text:style-name="P43"><text:span text:style-name="Strong_20_Emphasis"/></text:p>
      <text:p text:style-name="P43"><text:span text:style-name="Strong_20_Emphasis"/></text:p>
      <text:h text:style-name="P29" text:outline-level="2"><text:soft-page-break/><text:span text:style-name="Strong_20_Emphasis">6. Análisis agregado del derroche</text:span></text:h>
      <text:p text:style-name="Text_20_body">A partir de la salida obtenida se pueden extraer varias conclusiones relevantes.</text:p>
      <text:h text:style-name="P60" text:outline-level="3"><text:span text:style-name="Strong_20_Emphasis">6.1 Total de horas con derroche</text:span></text:h>
      <text:p text:style-name="Text_20_body">Se detectan: <text:span text:style-name="Strong_20_Emphasis"><text:span text:style-name="T6">367 horas con derroche.</text:span></text:span></text:p>
      <text:p text:style-name="Text_20_body"><text:span text:style-name="T15">S</text:span>obre un total de: <text:span text:style-name="Strong_20_Emphasis"><text:span text:style-name="T6">9433 horas</text:span></text:span></text:p>
      <text:p text:style-name="Text_20_body">Esto indica que el derroche es un fenómeno minoritario dentro del conjunto de datos, pero suficientemente representado como para ser modelado.</text:p>
      <text:h text:style-name="P60" text:outline-level="3"><text:span text:style-name="Strong_20_Emphasis"/></text:h>
      <text:h text:style-name="P60" text:outline-level="3"><text:span text:style-name="Strong_20_Emphasis">6.2 Distribución de clases</text:span></text:h>
      <text:p text:style-name="Text_20_body">La distribución observada es:</text:p>
      <text:list text:style-name="L91">
        <text:list-item>
          <text:p text:style-name="P181"><text:span text:style-name="Strong_20_Emphasis"><text:span text:style-name="T6">0 (sin derroche)</text:span></text:span><text:span text:style-name="T6"> → 9066 registros </text:span></text:p>
        </text:list-item>
        <text:list-item>
          <text:p text:style-name="P182"><text:span text:style-name="Strong_20_Emphasis"><text:span text:style-name="T6">1 (con derroche)</text:span></text:span> → 367 registros </text:p>
        </text:list-item>
      </text:list>
      <text:p text:style-name="Text_20_body">Esto revela un <text:span text:style-name="Strong_20_Emphasis"><text:span text:style-name="T6">desbalance de clases</text:span></text:span>, ya que la mayoría de observaciones corresponden a situaciones sin derroche.</text:p>
      <text:p text:style-name="Text_20_body">Este aspecto será relevante en fases posteriores, ya que puede influir en el entrenamiento y evaluación del modelo de IA.</text:p>
      <text:h text:style-name="P60" text:outline-level="3"><text:span text:style-name="Strong_20_Emphasis"/></text:h>
      <text:h text:style-name="P60" text:outline-level="3"><text:span text:style-name="Strong_20_Emphasis">6.3 Distribución temporal del derroche</text:span></text:h>
      <text:p text:style-name="Text_20_body">En la gráfica de historial diario se observa que los episodios de derroche no se distribuyen uniformemente, sino que se concentran en determinados periodos del año.</text:p>
      <text:p text:style-name="Text_20_body">Esto sugiere que el fenómeno está condicionado por factores estacionales y operativos, como por ejemplo:</text:p>
      <text:list text:style-name="L92">
        <text:list-item>
          <text:p text:style-name="P183">la necesidad de calefacción </text:p>
        </text:list-item>
        <text:list-item>
          <text:p text:style-name="P183">la ventilación del aula </text:p>
        </text:list-item>
        <text:list-item>
          <text:p text:style-name="P184">la dinámica de uso del espacio </text:p>
        </text:list-item>
      </text:list>
      <text:h text:style-name="P60" text:outline-level="3"><text:span text:style-name="Strong_20_Emphasis"/></text:h>
      <text:h text:style-name="P60" text:outline-level="3"><text:span text:style-name="Strong_20_Emphasis">6.4 Comportamiento del índice de apertura ponderado</text:span></text:h>
      <text:p text:style-name="Text_20_body">El resumen estadístico del índice muestra:</text:p>
      <text:list text:style-name="L93">
        <text:list-item>
          <text:p text:style-name="P185">media relativamente baja </text:p>
        </text:list-item>
        <text:list-item>
          <text:p text:style-name="P185">percentiles 25, 50 y 75 iguales a 0 </text:p>
        </text:list-item>
        <text:list-item>
          <text:p text:style-name="P186">valor máximo elevado </text:p>
        </text:list-item>
      </text:list>
      <text:p text:style-name="Text_20_body">Esto indica que la mayoría de horas no presentan aperturas relevantes, mientras que unas pocas concentran eventos de apertura prolongada o intensa.</text:p>
      <text:p text:style-name="Text_20_body"><text:soft-page-break/>Este comportamiento es coherente con el funcionamiento real de un aula, donde la mayor parte del tiempo puertas y ventanas permanecen cerradas o solo se abren de forma puntual.</text:p>
      <text:h text:style-name="P29" text:outline-level="2"><text:span text:style-name="Strong_20_Emphasis"/></text:h>
      <text:h text:style-name="P29" text:outline-level="2"><text:span text:style-name="Strong_20_Emphasis">7. Justificación técnica</text:span></text:h>
      <text:p text:style-name="Text_20_body">La definición de <text:span text:style-name="Source_20_Text"><text:span text:style-name="T7">hay_derroche</text:span></text:span> mediante una regla explícita presenta varias ventajas:</text:p>
      <text:h text:style-name="P60" text:outline-level="3"><text:span text:style-name="Strong_20_Emphasis">7.1 Interpretabilidad</text:span></text:h>
      <text:p text:style-name="Text_20_body">Permite justificar fácilmente por qué una hora ha sido clasificada como derroche.</text:p>
      <text:h text:style-name="P60" text:outline-level="3"><text:span text:style-name="Strong_20_Emphasis">7.2 Coherencia con el dominio</text:span></text:h>
      <text:p text:style-name="Text_20_body">La definición responde directamente al concepto energético que se pretende modelar: pérdida térmica con la calefacción funcionando.</text:p>
      <text:h text:style-name="P60" text:outline-level="3"><text:span text:style-name="Strong_20_Emphasis">7.3 Trazabilidad</text:span></text:h>
      <text:p text:style-name="Text_20_body">Al tratarse de una variable construida a partir de reglas claras, el proceso es transparente y fácilmente reproducible.</text:p>
      <text:h text:style-name="P29" text:outline-level="2"><text:span text:style-name="Strong_20_Emphasis"/></text:h>
      <text:h text:style-name="P29" text:outline-level="2"><text:span text:style-name="Strong_20_Emphasis">8. Importancia dentro del proyecto</text:span></text:h>
      <text:p text:style-name="Text_20_body">Esta fase constituye el paso en el que el problema queda formalizado en términos de datos.</text:p>
      <text:p text:style-name="Text_20_body">A partir de este momento ya existe una variable concreta que identifica episodios de derroche, lo que permite:</text:p>
      <text:list text:style-name="L94">
        <text:list-item>
          <text:p text:style-name="P187">analizar su frecuencia </text:p>
        </text:list-item>
        <text:list-item>
          <text:p text:style-name="P187">estudiar su distribución </text:p>
        </text:list-item>
        <text:list-item>
          <text:p text:style-name="P187">desplazarla temporalmente </text:p>
        </text:list-item>
        <text:list-item>
          <text:p text:style-name="P188">utilizarla como base del target predictivo </text:p>
        </text:list-item>
      </text:list>
      <text:p text:style-name="Text_20_body">En este sentido, <text:span text:style-name="Source_20_Text"><text:span text:style-name="T7">hay_derroche</text:span></text:span> puede considerarse la <text:span text:style-name="Strong_20_Emphasis">versión observada del fenómeno</text:span>, mientras que el target final será su versión adelantada una hora.</text:p>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9. Conclusión</text:span></text:h>
      <text:p text:style-name="Text_20_body">Se ha definido una variable binaria de derroche energético que combina el estado de la calefacción con el nivel de apertura ponderada del aula.</text:p>
      <text:p text:style-name="Text_20_body">El resultado obtenido permite identificar de forma objetiva las horas en las que existe pérdida energética y constituye la base directa para la construcción del problema de predicción supervisada.</text:p>
      <text:p text:style-name="Text_20_body"/>
      <text:p text:style-name="Text_20_body"/>
      <text:p text:style-name="Text_20_body"><draw:frame draw:style-name="fr3" draw:name="Imagen8" text:anchor-type="char" svg:width="17cm" svg:height="12.441cm" draw:z-index="7"><draw:image xlink:href="Pictures/10000001000003380000025B8BB3019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1"><text:soft-page-break/><text:span text:style-name="Strong_20_Emphasis">Construcción del target: derroche en la hora siguiente</text:span></text:h>
      <text:h text:style-name="P29" text:outline-level="2"><text:span text:style-name="Strong_20_Emphasis">1. Objetivo</text:span></text:h>
      <text:p text:style-name="Text_20_body">El objetivo de esta fase es transformar el problema en un problema de predicción supervisada, definiendo una variable objetivo que permita anticipar situaciones de derroche energético.</text:p>
      <text:p text:style-name="Text_20_body">En lugar de detectar el derroche en el momento actual, se plantea predecir si este ocurrirá en la siguiente hora, lo que permite construir un sistema de alerta temprana.</text:p>
      <text:h text:style-name="P29" text:outline-level="2"><text:span text:style-name="Strong_20_Emphasis">2. Definición del target</text:span></text:h>
      <text:p text:style-name="Text_20_body">Se define la variable:</text:p>
      <text:p text:style-name="P61"><text:span text:style-name="Strong_20_Emphasis"><text:span text:style-name="Source_20_Text">TARGET_derroche_proxima_hora</text:span></text:span></text:p>
      <text:p text:style-name="Text_20_body">como el valor de <text:span text:style-name="Source_20_Text"><text:span text:style-name="T16">hay_derroche</text:span></text:span> desplazado una hora hacia adelante.</text:p>
      <text:p text:style-name="Text_20_body">Esto se implementa mediante:</text:p>
      <text:p text:style-name="P36"><text:span text:style-name="Source_20_Text"><text:span text:style-name="T7">df_base_horaria['TARGET_derroche_proxima_hora'] = df_base_horaria['hay_derroche'].shift(-1)</text:span></text:span></text:p>
      <text:p text:style-name="Text_20_body">De este modo:</text:p>
      <text:list text:style-name="L95">
        <text:list-item>
          <text:p text:style-name="P189">las variables de una hora <text:span text:style-name="Strong_20_Emphasis">t</text:span></text:p>
        </text:list-item>
        <text:list-item>
          <text:p text:style-name="P189">predicen el derroche en la hora <text:span text:style-name="Strong_20_Emphasis">t + 1</text:span></text:p>
        </text:list-item>
      </text:list>
      <text:h text:style-name="P29" text:outline-level="2"><text:span text:style-name="Strong_20_Emphasis">3. Interpretación</text:span></text:h>
      <text:p text:style-name="Text_20_body">Para cada instante temporal:</text:p>
      <text:list text:style-name="L96">
        <text:list-item>
          <text:p text:style-name="P190"><text:span text:style-name="Source_20_Text">hay_derroche</text:span> → indica si hay derroche en la hora actual</text:p>
        </text:list-item>
        <text:list-item>
          <text:p text:style-name="P190"><text:span text:style-name="Source_20_Text">TARGET_derroche_proxima_hora</text:span> → indica si habrá derroche en la siguiente hora</text:p>
        </text:list-item>
      </text:list>
      <text:p text:style-name="Text_20_body">Ejempl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Hora</text:p>
            </table:table-cell>
            <table:table-cell table:style-name="Tabla1.A1" office:value-type="string">
              <text:p text:style-name="Table_20_Heading">hay_derroche</text:p>
            </table:table-cell>
            <table:table-cell table:style-name="Tabla1.A1" office:value-type="string">
              <text:p text:style-name="Table_20_Heading">TARGET</text:p>
            </table:table-cell>
          </table:table-row>
        </table:table-header-rows>
        <table:table-row>
          <table:table-cell table:style-name="Tabla1.A1" office:value-type="string">
            <text:p text:style-name="Table_20_Contents">06:00</text:p>
          </table:table-cell>
          <table:table-cell table:style-name="Tabla1.A1" office:value-type="string">
            <text:p text:style-name="Table_20_Contents">0</text:p>
          </table:table-cell>
          <table:table-cell table:style-name="Tabla1.A1" office:value-type="string">
            <text:p text:style-name="Table_20_Contents">1</text:p>
          </table:table-cell>
        </table:table-row>
        <table:table-row>
          <table:table-cell table:style-name="Tabla1.A1" office:value-type="string">
            <text:p text:style-name="Table_20_Contents">07:00</text:p>
          </table:table-cell>
          <table:table-cell table:style-name="Tabla1.A1" office:value-type="string">
            <text:p text:style-name="Table_20_Contents">1</text:p>
          </table:table-cell>
          <table:table-cell table:style-name="Tabla1.A1" office:value-type="string">
            <text:p text:style-name="Table_20_Contents">1</text:p>
          </table:table-cell>
        </table:table-row>
        <table:table-row>
          <table:table-cell table:style-name="Tabla1.A1" office:value-type="string">
            <text:p text:style-name="Table_20_Contents">08:00</text:p>
          </table:table-cell>
          <table:table-cell table:style-name="Tabla1.A1" office:value-type="string">
            <text:p text:style-name="Table_20_Contents">1</text:p>
          </table:table-cell>
          <table:table-cell table:style-name="Tabla1.A1" office:value-type="string">
            <text:p text:style-name="Table_20_Contents">0</text:p>
          </table:table-cell>
        </table:table-row>
      </table:table>
      <text:p text:style-name="Text_20_body">Interpretación:</text:p>
      <text:list text:style-name="L97">
        <text:list-item>
          <text:p text:style-name="P191">A las 06:00 no hay derroche, pero sí lo habrá en la siguiente hora</text:p>
        </text:list-item>
        <text:list-item>
          <text:p text:style-name="P191">A las 07:00 hay derroche y continuará</text:p>
        </text:list-item>
        <text:list-item>
          <text:p text:style-name="P191">A las 08:00 hay derroche, pero desaparecerá en la siguiente hora</text:p>
        </text:list-item>
      </text:list>
      <text:p text:style-name="Text_20_body">Esto permite anticipar cambios en el comportamiento energético.</text:p>
      <text:h text:style-name="P29" text:outline-level="2"><text:soft-page-break/><text:span text:style-name="Strong_20_Emphasis">4. Tratamiento de valores nulos</text:span></text:h>
      <text:p text:style-name="Text_20_body">El desplazamiento genera un valor nulo en la última fila del dataset, ya que no existe información de la hora siguiente.</text:p>
      <text:p text:style-name="Text_20_body">Para mantener la coherencia del dataset, se elimina dicha fila:</text:p>
      <text:p text:style-name="P36"><text:span text:style-name="Source_20_Text"><text:span text:style-name="T7">dropna(subset=['TARGET_derroche_proxima_hora'])</text:span></text:span></text:p>
      <text:p text:style-name="Text_20_body">Además, se convierte la variable a tipo entero:</text:p>
      <text:p text:style-name="P36"><text:span text:style-name="Source_20_Text"><text:span text:style-name="T7">astype(int)</text:span></text:span></text:p>
      <text:h text:style-name="P29" text:outline-level="2"><text:span text:style-name="Strong_20_Emphasis"/></text:h>
      <text:h text:style-name="P29" text:outline-level="2"><text:span text:style-name="Strong_20_Emphasis">5. Justificación técnica</text:span></text:h>
      <text:h text:style-name="P60" text:outline-level="3"><text:span text:style-name="Strong_20_Emphasis">5.1 Conversión a problema predictivo</text:span></text:h>
      <text:p text:style-name="Text_20_body">Este paso es clave, ya que transforma el problema en:</text:p>
      <text:p text:style-name="P61"><text:span text:style-name="Strong_20_Emphasis">clasificación binaria supervisada</text:span></text:p>
      <text:p text:style-name="Text_20_body">donde:</text:p>
      <text:list text:style-name="L98">
        <text:list-item>
          <text:p text:style-name="P192">entrada → variables de sensores en tiempo t</text:p>
        </text:list-item>
        <text:list-item>
          <text:p text:style-name="P192">salida → derroche en tiempo t+1</text:p>
        </text:list-item>
      </text:list>
      <text:h text:style-name="P60" text:outline-level="3"><text:span text:style-name="Strong_20_Emphasis"/></text:h>
      <text:h text:style-name="P60" text:outline-level="3"><text:span text:style-name="Strong_20_Emphasis">5.2 Enfoque de predicción adelantada</text:span></text:h>
      <text:p text:style-name="Text_20_body">El modelo no se limita a describir el pasado, sino que permite:</text:p>
      <text:list text:style-name="L99">
        <text:list-item>
          <text:p text:style-name="P193">anticipar situaciones de derroche</text:p>
        </text:list-item>
        <text:list-item>
          <text:p text:style-name="P193">generar alertas</text:p>
        </text:list-item>
        <text:list-item>
          <text:p text:style-name="P193">tomar decisiones preventivas</text:p>
        </text:list-item>
      </text:list>
      <text:p text:style-name="Text_20_body">Esto aporta valor práctico al sistema.</text:p>
      <text:h text:style-name="P60" text:outline-level="3"><text:span text:style-name="Strong_20_Emphasis"/></text:h>
      <text:h text:style-name="P60" text:outline-level="3"><text:span text:style-name="Strong_20_Emphasis">5.3 Evita fuga de información </text:span></text:h>
      <text:p text:style-name="Text_20_body">Al utilizar únicamente variables de la hora actual para predecir la siguiente, se evita que el modelo utilice información futura de forma indebida.</text:p>
      <text:p text:style-name="Text_20_body">Este aspecto es fundamental para garantizar la validez del modelo.</text:p>
      <text:h text:style-name="P29" text:outline-level="2"><text:span text:style-name="Strong_20_Emphasis"/></text:h>
      <text:p text:style-name="P43"><text:span text:style-name="Strong_20_Emphasis"/></text:p>
      <text:h text:style-name="P29" text:outline-level="2"><text:soft-page-break/><text:span text:style-name="Strong_20_Emphasis">6. Validación del resultado</text:span></text:h>
      <text:p text:style-name="Text_20_body">En la salida mostrada se observa que:</text:p>
      <text:list text:style-name="L100">
        <text:list-item>
          <text:p text:style-name="P194">el target está correctamente desplazado</text:p>
        </text:list-item>
        <text:list-item>
          <text:p text:style-name="P194">existe coherencia entre valores consecutivos</text:p>
        </text:list-item>
        <text:list-item>
          <text:p text:style-name="P194">los cambios en el target reflejan correctamente la evolución del derroche</text:p>
        </text:list-item>
      </text:list>
      <text:p text:style-name="Text_20_body">Esto confirma que la construcción del target es correcta.</text:p>
      <text:h text:style-name="P29" text:outline-level="2"><text:span text:style-name="Strong_20_Emphasis"/></text:h>
      <text:h text:style-name="P29" text:outline-level="2"><text:span text:style-name="Strong_20_Emphasis">7. Importancia dentro del pipeline</text:span></text:h>
      <text:p text:style-name="Text_20_body">Este paso marca la transición definitiva hacia el modelado:</text:p>
      <text:list text:style-name="L101">
        <text:list-item>
          <text:p text:style-name="P195">ya existe una variable objetivo clara</text:p>
        </text:list-item>
        <text:list-item>
          <text:p text:style-name="P195">el dataset está preparado para entrenamiento</text:p>
        </text:list-item>
        <text:list-item>
          <text:p text:style-name="P195">se puede aplicar Machine Learning o redes neuronales</text:p>
        </text:list-item>
      </text:list>
      <text:p text:style-name="Text_20_body">Sin este paso, el proyecto no sería predictivo.</text:p>
      <text:h text:style-name="P29" text:outline-level="2"><text:span text:style-name="Strong_20_Emphasis"/></text:h>
      <text:h text:style-name="P29" text:outline-level="2"><text:span text:style-name="Strong_20_Emphasis">8. Conclusión</text:span></text:h>
      <text:p text:style-name="Text_20_body">Se ha definido una variable objetivo que permite predecir el derroche energético con una hora de antelación, transformando el problema en un modelo de clasificación supervisada.</text:p>
      <text:p text:style-name="Text_20_body">Este enfoque permite no solo analizar el comportamiento del aula, sino también anticipar situaciones ineficientes y mejorar la gestión energética.</text:p>
      <text:p text:style-name="P153">La construcción del target mediante desplazamiento temporal permite transformar una variable descriptiva en una variable predictiva, alineando el dataset con un enfoque de forecasting de eventos.</text:p>
      <text:p text:style-name="P153"/>
      <text:p text:style-name="Text_20_body"><draw:frame draw:style-name="fr2" draw:name="Imagen9" text:anchor-type="char" svg:width="13.628cm" svg:height="5.9cm" draw:z-index="8"><draw:image xlink:href="Pictures/1000000100000203000000DFFD49E97A.png" xlink:type="simple" xlink:show="embed" xlink:actuate="onLoad" draw:mime-type="image/png"/></draw:frame></text:p>
      <text:h text:style-name="P28" text:outline-level="1"><text:soft-page-break/><text:span text:style-name="Strong_20_Emphasis">Construcción del dataset final para el modelo de IA</text:span></text:h>
      <text:h text:style-name="P29" text:outline-level="2"><text:span text:style-name="Strong_20_Emphasis">1. Objetivo</text:span></text:h>
      <text:p text:style-name="Text_20_body">El objetivo de esta fase es generar el dataset definitivo que será utilizado para el entrenamiento del modelo de Inteligencia Artificial.</text:p>
      <text:p text:style-name="Text_20_body">Este dataset debe cumplir varias condiciones:</text:p>
      <text:list text:style-name="L102">
        <text:list-item>
          <text:p text:style-name="P196">contener únicamente variables relevantes </text:p>
        </text:list-item>
        <text:list-item>
          <text:p text:style-name="P196">evitar sesgos o fugas de información </text:p>
        </text:list-item>
        <text:list-item>
          <text:p text:style-name="P196">presentar una estructura limpia y coherente </text:p>
        </text:list-item>
        <text:list-item>
          <text:p text:style-name="P197">estar preparado para su uso directo en modelos supervisados </text:p>
        </text:list-item>
      </text:list>
      <text:h text:style-name="P29" text:outline-level="2"><text:span text:style-name="Strong_20_Emphasis">2. Selección de variables</text:span></text:h>
      <text:p text:style-name="Text_20_body">Se eliminan aquellas variables que podrían introducir sesgos en el modelo o que están directamente relacionadas con la construcción del target.</text:p>
      <text:p text:style-name="Text_20_body">En concreto, se excluyen:</text:p>
      <text:list text:style-name="L103">
        <text:list-item>
          <text:p text:style-name="P198"><text:span text:style-name="Strong_20_Emphasis"><text:span text:style-name="Source_20_Text"><text:span text:style-name="T7">hay_derroche</text:span></text:span></text:span><text:line-break/>Representa el estado actual del derroche y está directamente relacionado con el target futuro. </text:p>
        </text:list-item>
        <text:list-item>
          <text:p text:style-name="P199"><text:span text:style-name="Strong_20_Emphasis"><text:span text:style-name="Source_20_Text"><text:span text:style-name="T7">indice_apertura_ponderado</text:span></text:span></text:span><text:line-break/>Se utiliza para construir la variable de derroche, por lo que incluirla permitiría al modelo aprender la regla directamente. </text:p>
          <text:p text:style-name="P200">df_modelo.drop(columns=columnas_excluir)</text:p>
        </text:list-item>
      </text:list>
      <text:h text:style-name="P29" text:outline-level="2"><text:span text:style-name="Strong_20_Emphasis">3. Justificación: evitar fuga de información</text:span></text:h>
      <text:p text:style-name="Text_20_body">Este fenómeno ocurre cuando el modelo tiene acceso a información que, en un escenario real, no estaría disponible en el momento de la predicción.</text:p>
      <text:p text:style-name="Text_20_body">En este caso:</text:p>
      <text:list text:style-name="L104">
        <text:list-item>
          <text:p text:style-name="P201"><text:span text:style-name="Source_20_Text"><text:span text:style-name="T7">indice_apertura_ponderado</text:span></text:span><text:span text:style-name="T7"> </text:span>está directamente relacionado con la definición de <text:span text:style-name="Source_20_Text"><text:span text:style-name="T7">hay_derroche</text:span></text:span><text:span text:style-name="T7"> </text:span></text:p>
        </text:list-item>
        <text:list-item>
          <text:p text:style-name="P202"><text:span text:style-name="Source_20_Text"><text:span text:style-name="T7">hay_derroche</text:span></text:span> es la versión actual del fenómeno que se intenta predecir en el futuro </text:p>
        </text:list-item>
      </text:list>
      <text:p text:style-name="Text_20_body">Si estas variables se mantuvieran, el modelo podría aprender la regla exacta en lugar de generalizar patrones, generando resultados artificialmente buenos pero poco útiles en la práctica.</text:p>
      <text:p text:style-name="Text_20_body"><text:span text:style-name="Strong_20_Emphasis"/></text:p>
      <text:p text:style-name="Text_20_body"><text:span text:style-name="Strong_20_Emphasis"/></text:p>
      <text:p text:style-name="Text_20_body"><text:span text:style-name="Strong_20_Emphasis"/></text:p>
      <text:h text:style-name="P29" text:outline-level="2"><text:soft-page-break/><text:span text:style-name="Strong_20_Emphasis">4. Limpieza final del dataset</text:span></text:h>
      <text:p text:style-name="Text_20_body">Se aplica una limpieza final orientada a garantizar la coherencia temporal y la ausencia de valores faltantes.</text:p>
      <text:h text:style-name="P60" text:outline-level="3"><text:span text:style-name="Strong_20_Emphasis">4.1 Forward fill</text:span></text:h>
      <text:p text:style-name="Text_20_body">Se utiliza propagación hacia adelante para completar valores faltantes, manteniendo la continuidad temporal del dataset.</text:p>
      <text:p text:style-name="Text_20_body">Este enfoque es coherente con la naturaleza de las variables, ya que muchas de ellas evolucionan de forma progresiva y no presentan cambios bruscos entre instantes consecutivos.</text:p>
      <text:h text:style-name="P203" text:outline-level="3"><text:span text:style-name="Strong_20_Emphasis">4.2 Eliminación de valores nulos restantes</text:span></text:h>
      <text:p text:style-name="P204">Se eliminan las filas que todavía contienen valores nulos tras el proceso anterior.</text:p>
      <text:p text:style-name="P205"><text:bookmark text:name="code-block-viewer Copia 9"/>dropna()</text:p>
      <text:p text:style-name="Text_20_body">Esto asegura que el dataset final:</text:p>
      <text:list text:style-name="L105">
        <text:list-item>
          <text:p text:style-name="P206">no contiene valores incompletos </text:p>
        </text:list-item>
        <text:list-item>
          <text:p text:style-name="P207">es compatible con algoritmos de Machine Learning </text:p>
        </text:list-item>
      </text:list>
      <text:h text:style-name="P29" text:outline-level="2"><text:span text:style-name="Strong_20_Emphasis">5. Estructura final del dataset</text:span></text:h>
      <text:p text:style-name="Text_20_body">El dataset generado contiene:</text:p>
      <text:list text:style-name="L106">
        <text:list-item>
          <text:p text:style-name="P208">variables temporales (hora, día de la semana, mes) </text:p>
        </text:list-item>
        <text:list-item>
          <text:p text:style-name="P208">variables ambientales internas (temperatura y humedad) </text:p>
        </text:list-item>
        <text:list-item>
          <text:p text:style-name="P208">variables de sensores y entorno (meteorología, presión, etc.) </text:p>
        </text:list-item>
        <text:list-item>
          <text:p text:style-name="P209">variable objetivo <text:span text:style-name="T7">(</text:span><text:span text:style-name="Source_20_Text"><text:span text:style-name="T7">TARGET_derroche_proxima_hora</text:span></text:span><text:span text:style-name="T7">) </text:span></text:p>
        </text:list-item>
      </text:list>
      <text:p text:style-name="Text_20_body">Cada fila representa una hora y cada columna una característica relevante para el modelo.</text:p>
      <text:h text:style-name="P29" text:outline-level="2"><text:span text:style-name="Strong_20_Emphasis">6. Distribución del target</text:span></text:h>
      <text:p text:style-name="Text_20_body">Se muestra la distribución de la variable objetivo: <text:span text:style-name="T17">value_counts()</text:span></text:p>
      <text:p text:style-name="Text_20_body">Esto permite identificar posibles problemas de desbalanceo de clases, que pueden afectar al rendimiento del modelo.</text:p>
      <text:p text:style-name="Text_20_body">Tal como se observó previamente, el dataset presenta:</text:p>
      <text:list text:style-name="L107">
        <text:list-item>
          <text:p text:style-name="P210">mayoría de casos sin derroche </text:p>
        </text:list-item>
        <text:list-item>
          <text:p text:style-name="P211">minoría de casos con derroche </text:p>
        </text:list-item>
      </text:list>
      <text:p text:style-name="Text_20_body">Este aspecto deberá tenerse en cuenta en la fase de modelado.</text:p>
      <text:p text:style-name="Text_20_body"/>
      <text:p text:style-name="Text_20_body"/>
      <text:p text:style-name="Text_20_body"/>
      <text:h text:style-name="P29" text:outline-level="2"><text:soft-page-break/><text:span text:style-name="Strong_20_Emphasis">7. Exportación del dataset</text:span></text:h>
      <text:p text:style-name="Text_20_body">El dataset final se exporta como:</text:p>
      <text:p text:style-name="P61"><text:span text:style-name="Strong_20_Emphasis"><text:span text:style-name="Source_20_Text">DATASET_ENTRENAMIENTO_IA.csv</text:span></text:span></text:p>
      <text:p text:style-name="Text_20_body">Este archivo constituye la entrada directa para:</text:p>
      <text:list text:style-name="L108">
        <text:list-item>
          <text:p text:style-name="P212">modelos de Machine Learning </text:p>
        </text:list-item>
        <text:list-item>
          <text:p text:style-name="P212">redes neuronales </text:p>
        </text:list-item>
        <text:list-item>
          <text:p text:style-name="P213">evaluaciones posteriores </text:p>
        </text:list-item>
      </text:list>
      <text:p text:style-name="Text_20_body">Además, se descarga automáticamente para su uso fuera del entorno Colab.</text:p>
      <text:h text:style-name="P29" text:outline-level="2"><text:span text:style-name="Strong_20_Emphasis">8. Justificación técnica</text:span></text:h>
      <text:p text:style-name="Text_20_body">Esta fase responde a buenas prácticas en preparación de datos para IA:</text:p>
      <text:list text:style-name="L109">
        <text:list-item>
          <text:p text:style-name="P214">eliminación de variables derivadas del target </text:p>
        </text:list-item>
        <text:list-item>
          <text:p text:style-name="P214">control de fuga de información </text:p>
        </text:list-item>
        <text:list-item>
          <text:p text:style-name="P214">tratamiento de valores nulos </text:p>
        </text:list-item>
        <text:list-item>
          <text:p text:style-name="P215">construcción de dataset tabular consistente </text:p>
        </text:list-item>
      </text:list>
      <text:p text:style-name="Text_20_body">Se garantiza así que el modelo:</text:p>
      <text:list text:style-name="L110">
        <text:list-item>
          <text:p text:style-name="P216">aprenda patrones reales </text:p>
        </text:list-item>
        <text:list-item>
          <text:p text:style-name="P216">generalice correctamente </text:p>
        </text:list-item>
        <text:list-item>
          <text:p text:style-name="P217">sea aplicable en escenarios reales </text:p>
        </text:list-item>
      </text:list>
      <text:h text:style-name="P29" text:outline-level="2"><text:span text:style-name="Strong_20_Emphasis"/></text:h>
      <text:h text:style-name="P29" text:outline-level="2"><text:span text:style-name="Strong_20_Emphasis">9. Importancia dentro del pipeline</text:span></text:h>
      <text:p text:style-name="Text_20_body">Este paso marca el final de la fase de preparación de datos y el inicio de la fase de modelado.</text:p>
      <text:p text:style-name="Text_20_body">A partir de este punto:</text:p>
      <text:list text:style-name="L111">
        <text:list-item>
          <text:p text:style-name="P218">los datos ya están listos para entrenamiento </text:p>
        </text:list-item>
        <text:list-item>
          <text:p text:style-name="P218">no se requieren transformaciones adicionales </text:p>
        </text:list-item>
        <text:list-item>
          <text:p text:style-name="P219">se puede aplicar directamente algoritmos de clasificación </text:p>
        </text:list-item>
      </text:list>
      <text:h text:style-name="P29" text:outline-level="2"><text:span text:style-name="Strong_20_Emphasis"/></text:h>
      <text:h text:style-name="P29" text:outline-level="2"><text:span text:style-name="Strong_20_Emphasis">10. Conclusión</text:span></text:h>
      <text:p text:style-name="Text_20_body">Se ha generado un dataset final limpio, coherente y preparado para el entrenamiento de modelos de Inteligencia Artificial, evitando problemas de fuga de información y garantizando la calidad del proceso.</text:p>
      <text:p text:style-name="Text_20_body">Este dataset constituye la base sobre la que se desarrollarán los modelos predictivos del proyecto, <text:span text:style-name="T4">y </text:span>se ha diseñado para reflejar un escenario real de predicción, donde únicamente se dispone de información histórica y no de variables derivadas directamente del fenómeno a predecir </text:p>
      <text:p text:style-name="Text_20_body"/>
      <text:h text:style-name="P220" text:outline-level="1"><text:soft-page-break/><text:span text:style-name="Strong_20_Emphasis">Fase </text:span><text:span text:style-name="Strong_20_Emphasis"><text:span text:style-name="T18">C</text:span></text:span><text:span text:style-name="Strong_20_Emphasis"> — </text:span><text:span text:style-name="Strong_20_Emphasis"><text:span text:style-name="T18">Modelado de IA</text:span></text:span></text:h>
      <text:h text:style-name="P28" text:outline-level="1"><text:span text:style-name="Strong_20_Emphasis"><text:span text:style-name="T19">Modelo de Red Neuronal para la predicción de derroche</text:span></text:span></text:h>
      <text:h text:style-name="P29" text:outline-level="2"><text:span text:style-name="Strong_20_Emphasis">1. Objetivo</text:span></text:h>
      <text:p text:style-name="Text_20_body">El objetivo de esta fase es construir un modelo de Inteligencia Artificial basado en una red neuronal capaz de predecir si se producirá una situación de derroche energético en la siguiente hora.</text:p>
      <text:p text:style-name="Text_20_body">Este modelo utiliza como entrada el dataset previamente preparado y como salida la variable:</text:p>
      <text:p text:style-name="P61"><text:span text:style-name="Strong_20_Emphasis"><text:span text:style-name="Source_20_Text">TARGET_derroche_proxima_hora</text:span></text:span></text:p>
      <text:h text:style-name="P29" text:outline-level="2"><text:span text:style-name="Strong_20_Emphasis">2. Preparación de los datos</text:span></text:h>
      <text:h text:style-name="P60" text:outline-level="3"><text:span text:style-name="Strong_20_Emphasis">2.1 Separación de variables</text:span></text:h>
      <text:p text:style-name="Text_20_body">Se separan:</text:p>
      <text:list text:style-name="L112">
        <text:list-item>
          <text:p text:style-name="P221"><text:span text:style-name="Strong_20_Emphasis"><text:span text:style-name="T7">X (features)</text:span></text:span> → todas las variables excepto el target </text:p>
        </text:list-item>
        <text:list-item>
          <text:p text:style-name="P222"><text:span text:style-name="Strong_20_Emphasis"><text:span text:style-name="T7">y (target)</text:span></text:span><text:span text:style-name="T7"> → </text:span><text:span text:style-name="Source_20_Text"><text:span text:style-name="T7">TARGET_derroche_proxima_hora</text:span></text:span><text:span text:style-name="T7"> </text:span></text:p>
        </text:list-item>
      </text:list>
      <text:h text:style-name="P60" text:outline-level="3"><text:span text:style-name="Strong_20_Emphasis"/></text:h>
      <text:h text:style-name="P60" text:outline-level="3"><text:span text:style-name="Strong_20_Emphasis">2.2 División temporal del dataset</text:span></text:h>
      <text:p text:style-name="Text_20_body">Se realiza una partición basada en el orden temporal:</text:p>
      <text:list text:style-name="L113">
        <text:list-item>
          <text:p text:style-name="P223"><text:span text:style-name="Strong_20_Emphasis">70% entrenamiento</text:span> </text:p>
        </text:list-item>
        <text:list-item>
          <text:p text:style-name="P223"><text:span text:style-name="Strong_20_Emphasis">15% validación</text:span> </text:p>
        </text:list-item>
        <text:list-item>
          <text:p text:style-name="P224"><text:span text:style-name="Strong_20_Emphasis">15% test</text:span> </text:p>
        </text:list-item>
      </text:list>
      <text:p text:style-name="Text_20_body">Este enfoque es fundamental en series temporales, ya que evita mezclar información futura con pasada.</text:p>
      <text:p text:style-name="P61">No se realiza una partición aleatoria, sino secuencial, respetando la cronología de los datos.</text:p>
      <text:h text:style-name="P60" text:outline-level="3"><text:span text:style-name="Strong_20_Emphasis">2.3 Escalado de variables</text:span></text:h>
      <text:p text:style-name="Text_20_body">Se aplica <text:span text:style-name="Strong_20_Emphasis">StandardScaler</text:span>, ajustado únicamente con los datos de entrenamiento:</text:p>
      <text:p text:style-name="P225">scaler.fit_transform(X_train)</text:p>
      <text:p text:style-name="P225"/>
      <text:p text:style-name="Text_20_body">Esto evita fuga de información y permite que la red neuronal trabaje con variables en una escala homogénea.</text:p>
      <text:h text:style-name="P29" text:outline-level="2"><text:span text:style-name="Strong_20_Emphasis"/></text:h>
      <text:p text:style-name="P43"><text:span text:style-name="Strong_20_Emphasis"/></text:p>
      <text:p text:style-name="P43"><text:span text:style-name="Strong_20_Emphasis"/></text:p>
      <text:h text:style-name="P29" text:outline-level="2"><text:soft-page-break/><text:span text:style-name="Strong_20_Emphasis">3. Arquitectura del modelo</text:span></text:h>
      <text:p text:style-name="Text_20_body">Se define una red neuronal secuencial con la siguiente estructura:</text:p>
      <text:list text:style-name="L114">
        <text:list-item>
          <text:p text:style-name="P226">Capa de entrada </text:p>
        </text:list-item>
        <text:list-item>
          <text:p text:style-name="P226">Dense (64 neuronas, ReLU) </text:p>
        </text:list-item>
        <text:list-item>
          <text:p text:style-name="P226">Dropout (30%) </text:p>
        </text:list-item>
        <text:list-item>
          <text:p text:style-name="P226">Dense (32 neuronas, ReLU) </text:p>
        </text:list-item>
        <text:list-item>
          <text:p text:style-name="P226">Dense (16 neuronas, ReLU) </text:p>
        </text:list-item>
        <text:list-item>
          <text:p text:style-name="P227">Capa de salida (1 neurona, Sigmoid) </text:p>
        </text:list-item>
      </text:list>
      <text:h text:style-name="P60" text:outline-level="3"><text:span text:style-name="Strong_20_Emphasis">Función de activación</text:span></text:h>
      <text:list text:style-name="L115">
        <text:list-item>
          <text:p text:style-name="P228">ReLU → capas ocultas </text:p>
        </text:list-item>
        <text:list-item>
          <text:p text:style-name="P229">Sigmoid → salida binaria (clasificación) </text:p>
        </text:list-item>
      </text:list>
      <text:h text:style-name="P60" text:outline-level="3"><text:span text:style-name="Strong_20_Emphasis">Función de pérdida</text:span></text:h>
      <text:list text:style-name="L116">
        <text:list-item>
          <text:p text:style-name="P230"><text:span text:style-name="Source_20_Text">binary_crossentropy</text:span> </text:p>
        </text:list-item>
      </text:list>
      <text:h text:style-name="P60" text:outline-level="3"><text:span text:style-name="Strong_20_Emphasis">Optimizador</text:span></text:h>
      <text:list text:style-name="L117">
        <text:list-item>
          <text:p text:style-name="P231"><text:span text:style-name="Source_20_Text">Adam</text:span> </text:p>
        </text:list-item>
      </text:list>
      <text:h text:style-name="P29" text:outline-level="2"><text:span text:style-name="Strong_20_Emphasis"/></text:h>
      <text:h text:style-name="P29" text:outline-level="2"><text:span text:style-name="Strong_20_Emphasis">4. Tratamiento del desbalanceo de clases</text:span></text:h>
      <text:p text:style-name="Text_20_body">Como se observó en fases anteriores, el dataset presenta un fuerte desbalance:</text:p>
      <text:list text:style-name="L118">
        <text:list-item>
          <text:p text:style-name="P232">mayoría → no derroche </text:p>
        </text:list-item>
        <text:list-item>
          <text:p text:style-name="P233">minoría → derroche </text:p>
        </text:list-item>
      </text:list>
      <text:p text:style-name="Text_20_body">Para corregirlo, se aplican <text:span text:style-name="Strong_20_Emphasis">pesos de clase</text:span>:</text:p>
      <text:p text:style-name="P225"><text:bookmark text:name="code-block-viewer Copia 11 Copia 1"/>{0: 1.0, 1: 5.0}</text:p>
      <text:p text:style-name="P225"/>
      <text:p text:style-name="Text_20_body">Esto penaliza más los errores en la clase minoritaria, incentivando al modelo a detectarla.</text:p>
      <text:h text:style-name="P29" text:outline-level="2"><text:span text:style-name="Strong_20_Emphasis"/></text:h>
      <text:h text:style-name="P29" text:outline-level="2"><text:span text:style-name="Strong_20_Emphasis">5. Early Stopping</text:span></text:h>
      <text:p text:style-name="Text_20_body">Se utiliza <text:span text:style-name="Source_20_Text">EarlyStopping</text:span> monitorizando la pérdida en validación:</text:p>
      <text:list text:style-name="L119">
        <text:list-item>
          <text:p text:style-name="P234">evita sobreentrenamiento </text:p>
        </text:list-item>
        <text:list-item>
          <text:p text:style-name="P235">restaura los mejores pesos </text:p>
          <text:p text:style-name="P235"><text:span text:style-name="Strong_20_Emphasis"/></text:p>
        </text:list-item>
      </text:list>
      <text:h text:style-name="P29" text:outline-level="2"><text:soft-page-break/><text:span text:style-name="Strong_20_Emphasis">6. Resultados obtenidos</text:span></text:h>
      <text:h text:style-name="P60" text:outline-level="3"><text:span text:style-name="Strong_20_Emphasis">Métricas principales</text:span></text:h>
      <text:list text:style-name="L120">
        <text:list-item>
          <text:p text:style-name="P236"><text:span text:style-name="Strong_20_Emphasis">Accuracy</text:span>: 91.69% </text:p>
        </text:list-item>
        <text:list-item>
          <text:p text:style-name="P236"><text:span text:style-name="Strong_20_Emphasis">Precision</text:span>: 44.12% </text:p>
        </text:list-item>
        <text:list-item>
          <text:p text:style-name="P236"><text:span text:style-name="Strong_20_Emphasis">Recall</text:span>: 14.85% </text:p>
        </text:list-item>
        <text:list-item>
          <text:p text:style-name="P237"><text:span text:style-name="Strong_20_Emphasis">F1-score</text:span>: 22.22% </text:p>
        </text:list-item>
      </text:list>
      <text:h text:style-name="P29" text:outline-level="2"><text:span text:style-name="Strong_20_Emphasis"/></text:h>
      <text:h text:style-name="P29" text:outline-level="2"><text:span text:style-name="Strong_20_Emphasis">7. Análisis de la matriz de confusión</text:span></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238"/>
            </table:table-cell>
            <table:table-cell table:style-name="Tabla2.A1" office:value-type="string">
              <text:p text:style-name="Table_20_Heading">Pred 0</text:p>
            </table:table-cell>
            <table:table-cell table:style-name="Tabla2.A1" office:value-type="string">
              <text:p text:style-name="Table_20_Heading">Pred 1</text:p>
            </table:table-cell>
          </table:table-row>
        </table:table-header-rows>
        <table:table-row>
          <table:table-cell table:style-name="Tabla2.A1" office:value-type="string">
            <text:p text:style-name="Table_20_Contents"><text:span text:style-name="Strong_20_Emphasis">Real 0</text:span></text:p>
          </table:table-cell>
          <table:table-cell table:style-name="Tabla2.A1" office:value-type="string">
            <text:p text:style-name="Table_20_Contents">1144</text:p>
          </table:table-cell>
          <table:table-cell table:style-name="Tabla2.A1" office:value-type="string">
            <text:p text:style-name="Table_20_Contents">19</text:p>
          </table:table-cell>
        </table:table-row>
        <table:table-row>
          <table:table-cell table:style-name="Tabla2.A1" office:value-type="string">
            <text:p text:style-name="Table_20_Contents"><text:span text:style-name="Strong_20_Emphasis">Real 1</text:span></text:p>
          </table:table-cell>
          <table:table-cell table:style-name="Tabla2.A1" office:value-type="string">
            <text:p text:style-name="Table_20_Contents">86</text:p>
          </table:table-cell>
          <table:table-cell table:style-name="Tabla2.A1" office:value-type="string">
            <text:p text:style-name="Table_20_Contents">15</text:p>
          </table:table-cell>
        </table:table-row>
      </table:table>
      <text:h text:style-name="P60" text:outline-level="3">Interpretación:</text:h>
      <text:list text:style-name="L121">
        <text:list-item>
          <text:p text:style-name="P239">Detecta muy bien el <text:span text:style-name="Strong_20_Emphasis">no derroche</text:span> </text:p>
        </text:list-item>
        <text:list-item>
          <text:p text:style-name="P240">Falla bastante en detectar el <text:span text:style-name="Strong_20_Emphasis">derroche real</text:span> </text:p>
        </text:list-item>
      </text:list>
      <text:p text:style-name="Text_20_body">Solo detecta:</text:p>
      <text:p text:style-name="P61"><text:span text:style-name="Strong_20_Emphasis">15 de 101 casos reales de derroche</text:span></text:p>
      <text:h text:style-name="P29" text:outline-level="2"><text:span text:style-name="Strong_20_Emphasis"/></text:h>
      <text:h text:style-name="P29" text:outline-level="2"><text:span text:style-name="Strong_20_Emphasis">8. Análisis del comportamiento del modelo</text:span></text:h>
      <text:h text:style-name="P60" text:outline-level="3"><text:span text:style-name="Strong_20_Emphasis">8.1 Accuracy engañoso</text:span></text:h>
      <text:p text:style-name="Text_20_body">El accuracy es alto (≈92%), pero está inflado por el desbalance de clases</text:p>
      <text:p text:style-name="Text_20_body">El modelo acierta mucho porque la mayoría son ceros.</text:p>
      <text:h text:style-name="P60" text:outline-level="3"><text:span text:style-name="Strong_20_Emphasis"/></text:h>
      <text:h text:style-name="P60" text:outline-level="3"><text:span text:style-name="Strong_20_Emphasis">8.2 Bajo recall (problema clave)</text:span></text:h>
      <text:p text:style-name="Text_20_body">El recall es: <text:span text:style-name="Strong_20_Emphasis">14.85%</text:span></text:p>
      <text:p text:style-name="Text_20_body">Esto significa que: el modelo <text:span text:style-name="Strong_20_Emphasis">no está detectando bien el derroche</text:span></text:p>
      <text:h text:style-name="P60" text:outline-level="3"><text:span text:style-name="Strong_20_Emphasis">8.3 Precisión moderada</text:span></text:h>
      <text:p text:style-name="Text_20_body">Cuando predice derroche: acierta ~44% de las veces </text:p>
      <text:p text:style-name="Text_20_body"><text:span text:style-name="T20">N</text:span>o es malo, pero predice muy pocos casos</text:p>
      <text:p text:style-name="Text_20_body"/>
      <text:h text:style-name="P29" text:outline-level="2"><text:soft-page-break/><text:span text:style-name="Strong_20_Emphasis">9. Evolución del entrenamiento</text:span></text:h>
      <text:h text:style-name="P60" text:outline-level="3"><text:span text:style-name="Strong_20_Emphasis">Accuracy</text:span></text:h>
      <text:list text:style-name="L122">
        <text:list-item>
          <text:p text:style-name="P241">entrenamiento ≈ 95–96% </text:p>
        </text:list-item>
        <text:list-item>
          <text:p text:style-name="P242">validación ≈ 84–88% </text:p>
        </text:list-item>
      </text:list>
      <text:p text:style-name="Text_20_body"><text:s/>ligera separación → indicio de overfitting</text:p>
      <text:h text:style-name="P60" text:outline-level="3"><text:span text:style-name="Strong_20_Emphasis">Loss</text:span></text:h>
      <text:list text:style-name="L123">
        <text:list-item>
          <text:p text:style-name="P243">entrenamiento ↓ continuo </text:p>
        </text:list-item>
        <text:list-item>
          <text:p text:style-name="P244">validación ↑ progresiva </text:p>
        </text:list-item>
      </text:list>
      <text:p text:style-name="Text_20_body"><text:s/>clara señal de <text:span text:style-name="Strong_20_Emphasis">sobreajuste</text:span></text:p>
      <text:h text:style-name="P29" text:outline-level="2"><text:span text:style-name="Strong_20_Emphasis">10. Diagnóstico del modelo (MUY IMPORTANTE)</text:span></text:h>
      <text:p text:style-name="Text_20_body">El modelo presenta el siguiente comportamiento:</text:p>
      <text:h text:style-name="P60" text:outline-level="3">Aprende bien la clase mayoritaria</text:h>
      <text:h text:style-name="P60" text:outline-level="3">No aprende correctamente la clase minoritaria</text:h>
      <text:p text:style-name="Text_20_body">Esto puede deberse a:</text:p>
      <text:list text:style-name="L124">
        <text:list-item>
          <text:p text:style-name="P245">fuerte desbalance de clases </text:p>
        </text:list-item>
        <text:list-item>
          <text:p text:style-name="P245">señal débil del fenómeno </text:p>
        </text:list-item>
        <text:list-item>
          <text:p text:style-name="P245">umbral de decisión <text:s/>demasiado restrictivo </text:p>
        </text:list-item>
        <text:list-item>
          <text:p text:style-name="P246">complejidad insuficiente o excesiva del modelo </text:p>
        </text:list-item>
      </text:list>
      <text:h text:style-name="P29" text:outline-level="2"><text:span text:style-name="Strong_20_Emphasis"/></text:h>
      <text:h text:style-name="P29" text:outline-level="2"><text:span text:style-name="Strong_20_Emphasis">11. Interpretación global</text:span></text:h>
      <text:p text:style-name="Text_20_body">El modelo:</text:p>
      <text:list text:style-name="L125">
        <text:list-item>
          <text:p text:style-name="P247">es capaz de capturar patrones generales </text:p>
        </text:list-item>
        <text:list-item>
          <text:p text:style-name="P248">pero no es suficientemente sensible para detectar el derroche </text:p>
        </text:list-item>
      </text:list>
      <text:p text:style-name="Text_20_body">Es un modelo <text:span text:style-name="Strong_20_Emphasis">conservador</text:span>:</text:p>
      <text:list text:style-name="L126">
        <text:list-item>
          <text:p text:style-name="P249">evita falsos positivos </text:p>
        </text:list-item>
        <text:list-item>
          <text:p text:style-name="P250">pero pierde muchos casos reales </text:p>
        </text:list-item>
      </text:list>
      <text:h text:style-name="P29" text:outline-level="2"><text:span text:style-name="Strong_20_Emphasis"/></text:h>
      <text:p text:style-name="P43"><text:span text:style-name="Strong_20_Emphasis"/></text:p>
      <text:p text:style-name="P43"><text:span text:style-name="Strong_20_Emphasis"/></text:p>
      <text:p text:style-name="P43"><text:span text:style-name="Strong_20_Emphasis"/></text:p>
      <text:h text:style-name="P29" text:outline-level="2"><text:soft-page-break/><text:span text:style-name="Strong_20_Emphasis">13. Conclusión</text:span></text:h>
      <text:p text:style-name="Text_20_body">Se ha construido un modelo de red neuronal capaz de predecir el derroche energético con alta precisión global, pero con limitaciones en la detección de la clase minoritaria.</text:p>
      <text:p text:style-name="Text_20_body">El modelo demuestra que:</text:p>
      <text:list text:style-name="L127">
        <text:list-item>
          <text:p text:style-name="P251">el problema es parcialmente predecible </text:p>
        </text:list-item>
        <text:list-item>
          <text:p text:style-name="P252">pero requiere ajustes para mejorar la detección de eventos de derroche</text:p>
        </text:list-item>
      </text:list>
      <text:p text:style-name="Text_20_body">El modelo desarrollado pone de manifiesto que, aunque el problema es abordable desde el punto de vista predictivo, la detección del derroche energético presenta una dificultad inherente asociada a su baja frecuencia y a la complejidad del fenómeno<draw:frame draw:style-name="fr5" draw:name="Imagen11" text:anchor-type="char" svg:x="9.571cm" svg:y="1.339cm" svg:width="6.138cm" svg:height="12.067cm" draw:z-index="10"><draw:image xlink:href="Pictures/10000001000000E8000001C8E6A79CEC.png" xlink:type="simple" xlink:show="embed" xlink:actuate="onLoad" draw:mime-type="image/png"/></draw:frame></text:p>
      <text:p text:style-name="Text_20_body"><draw:frame draw:style-name="fr6" draw:name="Imagen10" text:anchor-type="char" svg:x="0.025cm" svg:y="0cm" svg:width="9.971cm" svg:height="11.116cm" draw:z-index="9"><draw:image xlink:href="Pictures/10000001000001D60000020CCADCC06D.png" xlink:type="simple" xlink:show="embed" xlink:actuate="onLoad" draw:mime-type="image/png"/></draw:frame></text:p>
      <text:p text:style-name="Text_20_body"><draw:frame draw:style-name="fr3" draw:name="Imagen12" text:anchor-type="char" svg:width="17cm" svg:height="15.448cm" draw:z-index="11"><draw:image xlink:href="Pictures/10000001000002C800000287AB853A90.png" xlink:type="simple" xlink:show="embed" xlink:actuate="onLoad" draw:mime-type="image/png"/></draw:frame><text:soft-page-break/></text:p>
      <text:h text:style-name="P28" text:outline-level="1"><text:span text:style-name="Strong_20_Emphasis"/></text:h>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h text:style-name="P28" text:outline-level="1"><text:span text:style-name="Strong_20_Emphasis"/></text:h>
      <text:p text:style-name="P43"><text:span text:style-name="Strong_20_Emphasis"/></text:p>
      <text:p text:style-name="P43"><text:span text:style-name="Strong_20_Emphasis"/></text:p>
      <text:p text:style-name="P43"><text:span text:style-name="Strong_20_Emphasis"/></text:p>
      <text:h text:style-name="P253" text:outline-level="1"><text:soft-page-break/><text:span text:style-name="Strong_20_Emphasis">Fase </text:span><text:span text:style-name="Strong_20_Emphasis"><text:span text:style-name="T21">D</text:span></text:span><text:span text:style-name="Strong_20_Emphasis"> —</text:span><text:bookmark text:name="fase-d-dashboard"/><text:span text:style-name="Strong_20_Emphasis">Dashboard</text:span></text:h>
      <text:h text:style-name="P254" text:outline-level="2"><text:span text:style-name="Strong_20_Emphasis">1. Objetivo</text:span></text:h>
      <text:p text:style-name="Text_20_body">El objetivo de esta fase es construir un cuadro de mando interactivo en Grafana que permita visualizar y analizar el comportamiento energético del aula en tiempo real y a lo largo del histórico disponible.</text:p>
      <text:p text:style-name="Text_20_body">El dashboard permite:</text:p>
      <text:list text:style-name="L128">
        <text:list-item>
          <text:p text:style-name="P255">monitorizar variables ambientales clave </text:p>
        </text:list-item>
        <text:list-item>
          <text:p text:style-name="P255">analizar tendencias temporales </text:p>
        </text:list-item>
        <text:list-item>
          <text:p text:style-name="P256">facilitar la detección de patrones relacionados con el consumo energético </text:p>
          <text:p text:style-name="P256"/>
        </text:list-item>
      </text:list>
      <text:h text:style-name="P29" text:outline-level="2"><text:span text:style-name="Strong_20_Emphasis">2. Herramienta utilizada</text:span></text:h>
      <text:p text:style-name="Text_20_body">Se ha utilizado <text:span text:style-name="Strong_20_Emphasis">Grafana</text:span> como herramienta de visualización, conectada a la base de datos PostgreSQL (TimescaleDB) donde se almacenan los datos históricos del sistema domótico.</text:p>
      <text:p text:style-name="Text_20_body">Grafana permite:</text:p>
      <text:list text:style-name="L129">
        <text:list-item>
          <text:p text:style-name="P257">crear visualizaciones dinámicas </text:p>
        </text:list-item>
        <text:list-item>
          <text:p text:style-name="P257">trabajar con datos en tiempo real </text:p>
        </text:list-item>
        <text:list-item>
          <text:p text:style-name="P257">aplicar filtros interactivos </text:p>
        </text:list-item>
        <text:list-item>
          <text:p text:style-name="P258">construir dashboards intuitivos </text:p>
        </text:list-item>
      </text:list>
      <text:h text:style-name="P29" text:outline-level="2"><text:span text:style-name="Strong_20_Emphasis">3. Estructura del dashboard</text:span></text:h>
      <text:p text:style-name="Text_20_body">El dashboard desarrollado incluye tres tipos principales de visualizaciones:</text:p>
      <text:h text:style-name="P29" text:outline-level="2"><text:span text:style-name="Strong_20_Emphasis"/></text:h>
      <text:h text:style-name="P29" text:outline-level="2"><text:span text:style-name="Strong_20_Emphasis">3.1 Gauge — Temperatura media del aula</text:span></text:h>
      <text:p text:style-name="Text_20_body">Se ha implementado un panel tipo <text:span text:style-name="Strong_20_Emphasis">Gauge</text:span> que muestra la temperatura media del aula en el rango temporal seleccionado.</text:p>
      <text:h text:style-name="P60" text:outline-level="3">Características:</text:h>
      <text:list text:style-name="L130">
        <text:list-item>
          <text:p text:style-name="P259">valor mostrado: media de los sensores seleccionados </text:p>
        </text:list-item>
        <text:list-item>
          <text:p text:style-name="P259">unidad: grados Celsius </text:p>
        </text:list-item>
        <text:list-item>
          <text:p text:style-name="P259">rangos visuales: </text:p>
          <text:list>
            <text:list-item>
              <text:p text:style-name="P259">azul → valores bajos </text:p>
            </text:list-item>
            <text:list-item>
              <text:p text:style-name="P259">verde → zona de confort </text:p>
            </text:list-item>
            <text:list-item>
              <text:p text:style-name="P260">rojo → valores altos </text:p>
            </text:list-item>
          </text:list>
        </text:list-item>
      </text:list>
      <text:p text:style-name="Text_20_body"/>
      <text:p text:style-name="Text_20_body"/>
      <text:p text:style-name="Text_20_body"><text:soft-page-break/><text:s/>Ejemplo observado: 21.1 °C → dentro de rango confortable</text:p>
      <text:p text:style-name="P61"><draw:frame draw:style-name="fr4" draw:name="Imagen14" text:anchor-type="char" svg:width="15cm" svg:height="4.845cm" draw:z-index="13"><draw:image xlink:href="Pictures/1000000100000322000001336342CD85.png" xlink:type="simple" xlink:show="embed" xlink:actuate="onLoad" draw:mime-type="image/png"/></draw:frame></text:p>
      <text:p text:style-name="P261"><text:span text:style-name="Strong_20_Emphasis"><text:span text:style-name="T22">SELECT</text:span></text:span></text:p>
      <text:p text:style-name="P262">  <text:span text:style-name="T23">AVG</text:span><text:span text:style-name="T24">(</text:span><text:span text:style-name="T25">CAST</text:span><text:span text:style-name="T24">(</text:span><text:span text:style-name="T26">state </text:span><text:span text:style-name="T25">AS</text:span><text:span text:style-name="T26"> DOUBLE PRECISION</text:span><text:span text:style-name="T24">))</text:span><text:span text:style-name="T26"> </text:span><text:span text:style-name="T25">AS</text:span><text:span text:style-name="T26"> temperatura_media</text:span></text:p>
      <text:p text:style-name="P263"><text:span text:style-name="T27">FROM</text:span> ltss</text:p>
      <text:p text:style-name="P263"><text:span text:style-name="T27">WHERE</text:span> entity_id <text:span text:style-name="T28">IN</text:span> <text:span text:style-name="T29">(</text:span><text:span text:style-name="T30">$</text:span>{sensor_temp:sqlstring}<text:span text:style-name="T29">)</text:span></text:p>
      <text:p text:style-name="P262">  <text:span text:style-name="T31">AND</text:span><text:span text:style-name="T26"> $__timeFilter</text:span><text:span text:style-name="T24">(</text:span><text:span text:style-name="T26">time</text:span><text:span text:style-name="T24">)</text:span></text:p>
      <text:p text:style-name="P262">  <text:span text:style-name="T31">AND</text:span><text:span text:style-name="T26"> state </text:span><text:span text:style-name="T31">~</text:span><text:span text:style-name="T26"> </text:span><text:span text:style-name="T32">'^-?[0-9]+(\.[0-9]+)?$'</text:span></text:p>
      <text:p text:style-name="P43"><text:span text:style-name="Strong_20_Emphasis"/></text:p>
      <text:h text:style-name="P29" text:outline-level="2"><text:span text:style-name="Strong_20_Emphasis"/></text:h>
      <text:h text:style-name="P29" text:outline-level="2"><text:span text:style-name="Strong_20_Emphasis">3.2 Gauge — Humedad media del aula</text:span></text:h>
      <text:p text:style-name="Text_20_body">Se ha replicado la misma lógica para la humedad relativa.</text:p>
      <text:h text:style-name="P60" text:outline-level="3">Características:</text:h>
      <text:list text:style-name="L131">
        <text:list-item>
          <text:p text:style-name="P264">valor mostrado: media de humedad </text:p>
        </text:list-item>
        <text:list-item>
          <text:p text:style-name="P264">unidad: % </text:p>
        </text:list-item>
        <text:list-item>
          <text:p text:style-name="P264">rangos configurados: </text:p>
          <text:list>
            <text:list-item>
              <text:p text:style-name="P264">valores bajos </text:p>
            </text:list-item>
            <text:list-item>
              <text:p text:style-name="P264">rango óptimo </text:p>
            </text:list-item>
            <text:list-item>
              <text:p text:style-name="P265">valores altos </text:p>
            </text:list-item>
          </text:list>
        </text:list-item>
      </text:list>
      <text:p text:style-name="Text_20_body">Ejemplo: 46.4 % → dentro de rango adecuado</text:p>
      <text:p text:style-name="P61"/>
      <text:p text:style-name="P61"><draw:frame draw:style-name="fr2" draw:name="Imagen15" text:anchor-type="char" svg:width="15cm" svg:height="5.299cm" draw:z-index="14"><draw:image xlink:href="Pictures/100000010000030F000001322D042520.png" xlink:type="simple" xlink:show="embed" xlink:actuate="onLoad" draw:mime-type="image/png"/></draw:frame></text:p>
      <text:p text:style-name="P261"><text:soft-page-break/><text:span text:style-name="Strong_20_Emphasis"><text:span text:style-name="T22">SELECT</text:span></text:span></text:p>
      <text:p text:style-name="P262">  <text:span text:style-name="T23">AVG</text:span><text:span text:style-name="T24">(</text:span><text:span text:style-name="T25">CAST</text:span><text:span text:style-name="T24">(</text:span><text:span text:style-name="T26">state </text:span><text:span text:style-name="T25">AS</text:span><text:span text:style-name="T26"> DOUBLE PRECISION</text:span><text:span text:style-name="T24">))</text:span><text:span text:style-name="T26"> </text:span><text:span text:style-name="T25">AS</text:span><text:span text:style-name="T26"> temperatura_media</text:span></text:p>
      <text:p text:style-name="P263"><text:span text:style-name="T27">FROM</text:span> ltss</text:p>
      <text:p text:style-name="P263"><text:span text:style-name="T27">WHERE</text:span> entity_id <text:span text:style-name="T28">IN</text:span> <text:span text:style-name="T29">(</text:span><text:span text:style-name="T30">$</text:span>{sensor_temp:sqlstring}<text:span text:style-name="T29">)</text:span></text:p>
      <text:p text:style-name="P262">  <text:span text:style-name="T31">AND</text:span><text:span text:style-name="T26"> $__timeFilter</text:span><text:span text:style-name="T24">(</text:span><text:span text:style-name="T26">time</text:span><text:span text:style-name="T24">)</text:span></text:p>
      <text:p text:style-name="P262">  <text:span text:style-name="T31">AND</text:span><text:span text:style-name="T26"> state </text:span><text:span text:style-name="T31">~</text:span><text:span text:style-name="T26"> </text:span><text:span text:style-name="T32">'^-?[0-9]+(\.[0-9]+)?$'</text:span></text:p>
      <text:p text:style-name="P43"><text:span text:style-name="Strong_20_Emphasis"/></text:p>
      <text:h text:style-name="P29" text:outline-level="2"><text:span text:style-name="Strong_20_Emphasis"/></text:h>
      <text:h text:style-name="P29" text:outline-level="2"><text:span text:style-name="Strong_20_Emphasis">3.3 Serie temporal — Temperatura</text:span></text:h>
      <text:p text:style-name="Text_20_body">Se ha creado una visualización de tipo <text:span text:style-name="Strong_20_Emphasis">Time Series</text:span> que muestra la evolución de la temperatura a lo largo del tiempo.</text:p>
      <text:h text:style-name="P60" text:outline-level="3">Características:</text:h>
      <text:list text:style-name="L132">
        <text:list-item>
          <text:p text:style-name="P266">eje X → tiempo </text:p>
        </text:list-item>
        <text:list-item>
          <text:p text:style-name="P266">eje Y → temperatura </text:p>
        </text:list-item>
        <text:list-item>
          <text:p text:style-name="P266">múltiples sensores representados simultáneamente </text:p>
        </text:list-item>
        <text:list-item>
          <text:p text:style-name="P267">líneas diferenciadas por sensor </text:p>
        </text:list-item>
      </text:list>
      <text:h text:style-name="P60" text:outline-level="3">Análisis:</text:h>
      <text:list text:style-name="L133">
        <text:list-item>
          <text:p text:style-name="P268">se observan patrones estacionales </text:p>
        </text:list-item>
        <text:list-item>
          <text:p text:style-name="P268">comportamiento coherente entre sensores </text:p>
        </text:list-item>
        <text:list-item>
          <text:p text:style-name="P269">variabilidad diaria </text:p>
        </text:list-item>
      </text:list>
      <text:p text:style-name="Text_20_body"/>
      <text:p text:style-name="Text_20_body"><draw:frame draw:style-name="fr3" draw:name="Imagen16" text:anchor-type="char" svg:width="17cm" svg:height="7.168cm" draw:z-index="15"><draw:image xlink:href="Pictures/100000010000062700000143A4AAF74C.png" xlink:type="simple" xlink:show="embed" xlink:actuate="onLoad" draw:mime-type="image/png"/></draw:frame></text:p>
      <text:p text:style-name="Text_20_body"/>
      <text:p text:style-name="Text_20_body"/>
      <text:p text:style-name="Text_20_body"/>
      <text:p text:style-name="Text_20_body"/>
      <text:p text:style-name="P270"><text:soft-page-break/>SELECT</text:p>
      <text:p text:style-name="P262">  <text:span text:style-name="T26">time </text:span><text:span text:style-name="T25">AS</text:span><text:span text:style-name="T26"> "time"</text:span><text:span text:style-name="T24">,</text:span></text:p>
      <text:p text:style-name="P262">  <text:span text:style-name="T25">CAST</text:span><text:span text:style-name="T24">(</text:span><text:span text:style-name="T26">state </text:span><text:span text:style-name="T25">AS</text:span><text:span text:style-name="T26"> DOUBLE PRECISION</text:span><text:span text:style-name="T24">)</text:span><text:span text:style-name="T26"> </text:span><text:span text:style-name="T25">AS</text:span><text:span text:style-name="T26"> value</text:span><text:span text:style-name="T24">,</text:span></text:p>
      <text:p text:style-name="P262">  <text:span text:style-name="T23">REPLACE</text:span><text:span text:style-name="T24">(</text:span></text:p>
      <text:p text:style-name="P262">    <text:span text:style-name="T23">REPLACE</text:span><text:span text:style-name="T24">(</text:span><text:span text:style-name="T26">entity_id</text:span><text:span text:style-name="T24">,</text:span><text:span text:style-name="T26"> </text:span><text:span text:style-name="T32">'sensor.sensor_temperatura_'</text:span><text:span text:style-name="T24">,</text:span><text:span text:style-name="T26"> </text:span><text:span text:style-name="T32">'Valor Sensor '</text:span><text:span text:style-name="T24">),</text:span></text:p>
      <text:p text:style-name="P262">    <text:span text:style-name="T32">'_temperature'</text:span><text:span text:style-name="T24">,</text:span></text:p>
      <text:p text:style-name="P262">    <text:span text:style-name="T32">''</text:span></text:p>
      <text:p text:style-name="P262">  <text:span text:style-name="T24">)</text:span><text:span text:style-name="T26"> </text:span><text:span text:style-name="T25">AS</text:span><text:span text:style-name="T26"> metric</text:span></text:p>
      <text:p text:style-name="P263"><text:span text:style-name="T27">FROM</text:span> ltss</text:p>
      <text:p text:style-name="P263"><text:span text:style-name="T27">WHERE</text:span> entity_id <text:span text:style-name="T28">IN</text:span> <text:span text:style-name="T29">(</text:span><text:span text:style-name="T30">$</text:span>{sensor_temp:sqlstring}<text:span text:style-name="T29">)</text:span></text:p>
      <text:p text:style-name="P262">  <text:span text:style-name="T31">AND</text:span><text:span text:style-name="T26"> $__timeFilter</text:span><text:span text:style-name="T24">(</text:span><text:span text:style-name="T26">time</text:span><text:span text:style-name="T24">)</text:span></text:p>
      <text:p text:style-name="P262">  <text:span text:style-name="T31">AND</text:span><text:span text:style-name="T26"> state </text:span><text:span text:style-name="T31">~</text:span><text:span text:style-name="T26"> </text:span><text:span text:style-name="T32">'^-?[0-9]+(\.[0-9]+)?$'</text:span></text:p>
      <text:p text:style-name="P263"><text:span text:style-name="T27">ORDER</text:span> BY time</text:p>
      <text:p text:style-name="Text_20_body"/>
      <text:h text:style-name="P29" text:outline-level="2"><text:span text:style-name="Strong_20_Emphasis">3.4 Serie temporal — Humedad</text:span></text:h>
      <text:p text:style-name="Text_20_body">Se ha replicado la misma estructura para la humedad.</text:p>
      <text:h text:style-name="P60" text:outline-level="3">Características:</text:h>
      <text:list text:style-name="L134">
        <text:list-item>
          <text:p text:style-name="P271">evolución temporal de la humedad </text:p>
        </text:list-item>
        <text:list-item>
          <text:p text:style-name="P271">comparación entre sensores </text:p>
        </text:list-item>
        <text:list-item>
          <text:p text:style-name="P272">visualización de variaciones </text:p>
        </text:list-item>
      </text:list>
      <text:p text:style-name="Text_20_body"><draw:frame draw:style-name="fr2" draw:name="Imagen17" text:anchor-type="char" svg:width="19.611cm" svg:height="5.87cm" draw:z-index="16"><draw:image xlink:href="Pictures/1000000100000621000000FF5C8831A0.png" xlink:type="simple" xlink:show="embed" xlink:actuate="onLoad" draw:mime-type="image/png"/></draw:frame></text:p>
      <text:p text:style-name="P261"><text:span text:style-name="Strong_20_Emphasis"><text:span text:style-name="T22">SELECT</text:span></text:span></text:p>
      <text:p text:style-name="P262">  <text:span text:style-name="T26">time </text:span><text:span text:style-name="T25">AS</text:span><text:span text:style-name="T26"> "time"</text:span><text:span text:style-name="T24">,</text:span></text:p>
      <text:p text:style-name="P262">  <text:span text:style-name="T25">CAST</text:span><text:span text:style-name="T24">(</text:span><text:span text:style-name="T26">state </text:span><text:span text:style-name="T25">AS</text:span><text:span text:style-name="T26"> DOUBLE PRECISION</text:span><text:span text:style-name="T24">)</text:span><text:span text:style-name="T26"> </text:span><text:span text:style-name="T25">AS</text:span><text:span text:style-name="T26"> value</text:span><text:span text:style-name="T24">,</text:span></text:p>
      <text:p text:style-name="P262">  <text:span text:style-name="T23">REPLACE</text:span><text:span text:style-name="T24">(</text:span></text:p>
      <text:p text:style-name="P262">    <text:span text:style-name="T23">REPLACE</text:span><text:span text:style-name="T24">(</text:span><text:span text:style-name="T26">entity_id</text:span><text:span text:style-name="T24">,</text:span><text:span text:style-name="T26"> </text:span><text:span text:style-name="T32">'sensor.sensor_temperatura_'</text:span><text:span text:style-name="T24">,</text:span><text:span text:style-name="T26"> </text:span><text:span text:style-name="T32">'Sensor '</text:span><text:span text:style-name="T24">),</text:span></text:p>
      <text:p text:style-name="P262">    <text:span text:style-name="T32">'_humidity'</text:span><text:span text:style-name="T24">,</text:span></text:p>
      <text:p text:style-name="P262">    <text:span text:style-name="T32">''</text:span></text:p>
      <text:p text:style-name="P262">  <text:span text:style-name="T24">)</text:span><text:span text:style-name="T26"> </text:span><text:span text:style-name="T25">AS</text:span><text:span text:style-name="T26"> metric</text:span></text:p>
      <text:p text:style-name="P263"><text:span text:style-name="T27">FROM</text:span> ltss</text:p>
      <text:p text:style-name="P263"><text:span text:style-name="T27">WHERE</text:span> entity_id <text:span text:style-name="T28">IN</text:span> <text:span text:style-name="T29">(</text:span><text:span text:style-name="T30">$</text:span>{sensor_hum:sqlstring}<text:span text:style-name="T29">)</text:span></text:p>
      <text:p text:style-name="P262">  <text:span text:style-name="T31">AND</text:span><text:span text:style-name="T26"> $__timeFilter</text:span><text:span text:style-name="T24">(</text:span><text:span text:style-name="T26">time</text:span><text:span text:style-name="T24">)</text:span></text:p>
      <text:p text:style-name="P262">  <text:span text:style-name="T31">AND</text:span><text:span text:style-name="T26"> state </text:span><text:span text:style-name="T31">~</text:span><text:span text:style-name="T26"> </text:span><text:span text:style-name="T32">'^-?[0-9]+(\.[0-9]+)?$'</text:span></text:p>
      <text:p text:style-name="P273"><text:span text:style-name="T27">ORDER</text:span> BY time</text:p>
      <text:h text:style-name="P274" text:outline-level="2"><text:soft-page-break/><text:span text:style-name="Strong_20_Emphasis">4. Variables (filtros interactivos)</text:span></text:h>
      <text:p text:style-name="Text_20_body">Se han definido variables en Grafana para permitir la selección dinámica de sensores:</text:p>
      <text:list text:style-name="L135">
        <text:list-item>
          <text:p text:style-name="P275"><text:span text:style-name="Strong_20_Emphasis">Selección sensor temperatura</text:span> </text:p>
        </text:list-item>
        <text:list-item>
          <text:p text:style-name="P276"><text:span text:style-name="Strong_20_Emphasis">Selección sensor humedad</text:span> </text:p>
        </text:list-item>
      </text:list>
      <text:p text:style-name="Text_20_body">Estas variables permiten:</text:p>
      <text:list text:style-name="L136">
        <text:list-item>
          <text:p text:style-name="P277">mostrar uno o varios sensores </text:p>
        </text:list-item>
        <text:list-item>
          <text:p text:style-name="P277">comparar comportamientos </text:p>
        </text:list-item>
        <text:list-item>
          <text:p text:style-name="P278">adaptar la visualización al análisis deseado </text:p>
          <text:p text:style-name="P278"><draw:frame draw:style-name="fr4" draw:name="Imagen18" text:anchor-type="char" svg:width="16.249cm" svg:height="1.302cm" draw:z-index="17"><draw:image xlink:href="Pictures/100000010000029500000035668FD10B.png" xlink:type="simple" xlink:show="embed" xlink:actuate="onLoad" draw:mime-type="image/png"/></draw:frame></text:p>
        </text:list-item>
      </text:list>
      <text:h text:style-name="P29" text:outline-level="2"><draw:frame draw:style-name="fr5" draw:name="Imagen19" text:anchor-type="char" svg:x="-1.238cm" svg:y="0cm" svg:width="10.261cm" svg:height="9.924cm" draw:z-index="18"><draw:image xlink:href="Pictures/10000001000001C400000177C2D6930E.png" xlink:type="simple" xlink:show="embed" xlink:actuate="onLoad" draw:mime-type="image/png"/></draw:frame><draw:frame draw:style-name="fr5" draw:name="Imagen20" text:anchor-type="char" svg:x="9.021cm" svg:y="-0.071cm" svg:width="9.061cm" svg:height="9.994cm" draw:z-index="19"><draw:image xlink:href="Pictures/10000001000001CC000001A045DE3053.png" xlink:type="simple" xlink:show="embed" xlink:actuate="onLoad" draw:mime-type="image/png"/></draw:frame></text:h>
      <text:p text:style-name="P43"/>
      <text:p text:style-name="P43"/>
      <text:p text:style-name="P43"/>
      <text:p text:style-name="P43"/>
      <text:p text:style-name="P43"><text:span text:style-name="Strong_20_Emphasis"/></text:p>
      <text:p text:style-name="P43"><text:span text:style-name="Strong_20_Emphasis"/></text:p>
      <text:h text:style-name="P29" text:outline-level="2"><text:soft-page-break/><text:span text:style-name="Strong_20_Emphasis">5. Rango temporal</text:span></text:h>
      <text:p text:style-name="Text_20_body">El dashboard permite seleccionar el intervalo de tiempo mediante el selector superior de Grafana.</text:p>
      <text:p text:style-name="Text_20_body">Esto permite:</text:p>
      <text:list text:style-name="L137">
        <text:list-item>
          <text:p text:style-name="P279">analizar periodos concretos </text:p>
        </text:list-item>
        <text:list-item>
          <text:p text:style-name="P279">observar tendencias a corto y largo plazo </text:p>
        </text:list-item>
        <text:list-item>
          <text:p text:style-name="P280">realizar comparativas </text:p>
        </text:list-item>
      </text:list>
      <text:h text:style-name="P29" text:outline-level="2"><text:span text:style-name="Strong_20_Emphasis"/></text:h>
      <text:h text:style-name="P29" text:outline-level="2"><text:span text:style-name="Strong_20_Emphasis">6. Justificación técnica</text:span></text:h>
      <text:p text:style-name="Text_20_body">El diseño del dashboard responde a varios criterios:</text:p>
      <text:h text:style-name="P60" text:outline-level="3"><text:span text:style-name="Strong_20_Emphasis">6.1 Simplicidad</text:span></text:h>
      <text:p text:style-name="Text_20_body">Se prioriza una estructura clara y fácil de interpretar.</text:p>
      <text:h text:style-name="P60" text:outline-level="3"><text:span text:style-name="Strong_20_Emphasis">6.2 Relevancia</text:span></text:h>
      <text:p text:style-name="Text_20_body">Se incluyen únicamente variables clave:</text:p>
      <text:list text:style-name="L138">
        <text:list-item>
          <text:p text:style-name="P281">temperatura </text:p>
        </text:list-item>
        <text:list-item>
          <text:p text:style-name="P282">humedad </text:p>
        </text:list-item>
      </text:list>
      <text:h text:style-name="P60" text:outline-level="3"><text:span text:style-name="Strong_20_Emphasis">6.3 Interactividad</text:span></text:h>
      <text:p text:style-name="Text_20_body">El uso de variables permite adaptar el análisis en tiempo real.</text:p>
      <text:h text:style-name="P60" text:outline-level="3"><text:span text:style-name="Strong_20_Emphasis">6.4 Coherencia</text:span></text:h>
      <text:p text:style-name="Text_20_body">Se mantiene el mismo diseño para temperatura y humedad, facilitando la comprensión.</text:p>
      <text:h text:style-name="P29" text:outline-level="2"><text:span text:style-name="Strong_20_Emphasis"/></text:h>
      <text:h text:style-name="P29" text:outline-level="2"><text:span text:style-name="Strong_20_Emphasis">8. Conclusión</text:span></text:h>
      <text:p text:style-name="Text_20_body">El dashboard desarrollado permite monitorizar de forma clara e interactiva las condiciones ambientales del aula, facilitando el análisis del comportamiento energético y sirviendo como herramienta de apoyo para la toma de decisiones.</text:p>
      <text:p text:style-name="P283"><text:span text:style-name="Strong_20_Emphasis"/></text:p>
      <text:p text:style-name="P28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oft-page-break/><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h text:style-name="P28" text:outline-level="1"><text:span text:style-name="Strong_20_Emphasis"/></text:h>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h text:style-name="P28" text:outline-level="1"><text:soft-page-break/><text:span text:style-name="Strong_20_Emphasis">Modelo de Machine Learning lineal para la inferencia de temperatura</text:span></text:h>
      <text:h text:style-name="P29" text:outline-level="2"><text:span text:style-name="Strong_20_Emphasis">1. Objetivo</text:span></text:h>
      <text:p text:style-name="Text_20_body">El objetivo de esta fase es construir un modelo de Machine Learning basado en regresión lineal que permita estimar la temperatura del Aula 2 a partir de la temperatura del Aula 1.</text:p>
      <text:p text:style-name="Text_20_body">Este modelo se utiliza como alternativa al enfoque basado en diferencia media constante, permitiendo capturar de forma más precisa la relación entre ambas variables.</text:p>
      <text:p text:style-name="Text_20_body"><text:span text:style-name="Strong_20_Emphasis"/></text:p>
      <text:h text:style-name="P29" text:outline-level="2"><text:span text:style-name="Strong_20_Emphasis">2. Planteamiento del modelo</text:span></text:h>
      <text:p text:style-name="Text_20_body">Se plantea un problema de regresión donde:</text:p>
      <text:list text:style-name="L139">
        <text:list-item>
          <text:p text:style-name="P284"><text:span text:style-name="Strong_20_Emphasis">Variable independiente (X)</text:span>: temperatura del Aula 1 (<text:span text:style-name="Source_20_Text">temp_aula1</text:span>) </text:p>
        </text:list-item>
        <text:list-item>
          <text:p text:style-name="P285"><text:span text:style-name="Strong_20_Emphasis">Variable dependiente (y)</text:span>: temperatura del Aula 2 (<text:span text:style-name="Source_20_Text">temp_aula2</text:span>) </text:p>
        </text:list-item>
      </text:list>
      <text:p text:style-name="Text_20_body">El modelo aprende una relación de tipo:</text:p>
      <text:p text:style-name="P61"><text:span text:style-name="Strong_20_Emphasis">temp_aula2 = a · temp_aula1 + b</text:span></text:p>
      <text:h text:style-name="P29" text:outline-level="2"><text:span text:style-name="Strong_20_Emphasis">3. Entrenamiento del modelo</text:span></text:h>
      <text:p text:style-name="P286">Para entrenar el modelo se utilizan únicamente los datos en los que existen mediciones simultáneas en ambas aulas.</text:p>
      <text:p text:style-name="P287">df_comparacion = merge(..., how='inner')</text:p>
      <text:p text:style-name="Text_20_body">Esto garantiza que el modelo se entrene con datos reales y no con valores imputados.</text:p>
      <text:p text:style-name="Text_20_body">Se utiliza:</text:p>
      <text:list text:style-name="L140">
        <text:list-item>
          <text:p text:style-name="P288"><text:span text:style-name="Strong_20_Emphasis">Modelo</text:span>: <text:span text:style-name="Source_20_Text"><text:span text:style-name="T7">LinearRegression</text:span></text:span><text:span text:style-name="T7"> (Scikit-Learn) </text:span></text:p>
        </text:list-item>
        <text:list-item>
          <text:p text:style-name="P289"><text:span text:style-name="Strong_20_Emphasis">Entrenamiento</text:span>: ajuste directo mediante mínimos cuadrados </text:p>
        </text:list-item>
      </text:list>
      <text:h text:style-name="P29" text:outline-level="2"><text:span text:style-name="Strong_20_Emphasis">4. Aplicación del modelo</text:span></text:h>
      <text:p text:style-name="Text_20_body">Una vez entrenado, el modelo se utiliza para reconstruir los valores faltantes de temperatura del Aula 2.</text:p>
      <text:p text:style-name="Text_20_body">En aquellos casos donde no existe medición real: se estima la temperatura mediante la predicción del modelo lineal</text:p>
      <text:p text:style-name="Text_20_body">Esto permite obtener una serie temporal completa y coherente.</text:p>
      <text:p text:style-name="Text_20_body"/>
      <text:p text:style-name="Text_20_body"/>
      <text:h text:style-name="P29" text:outline-level="2"><text:soft-page-break/><text:span text:style-name="Strong_20_Emphasis">5. Visualización del modelo</text:span></text:h>
      <text:p text:style-name="Text_20_body">La gráfica muestra:</text:p>
      <text:list text:style-name="L141">
        <text:list-item>
          <text:p text:style-name="P290">puntos azules → datos reales </text:p>
        </text:list-item>
        <text:list-item>
          <text:p text:style-name="P291">línea roja → predicción del modelo lineal </text:p>
        </text:list-item>
      </text:list>
      <text:p text:style-name="Text_20_body"><text:span text:style-name="Strong_20_Emphasis"/></text:p>
      <text:h text:style-name="P29" text:outline-level="2"><text:span text:style-name="Strong_20_Emphasis">6. Análisis de la gráfica</text:span></text:h>
      <text:h text:style-name="P60" text:outline-level="3"><text:span text:style-name="Strong_20_Emphasis">6.1 Alta correlación lineal</text:span></text:h>
      <text:p text:style-name="Text_20_body">Los datos se distribuyen claramente alrededor de una recta, lo que indica:</text:p>
      <text:list text:style-name="L142">
        <text:list-item>
          <text:p text:style-name="P292">fuerte relación lineal entre ambas variables </text:p>
        </text:list-item>
        <text:list-item>
          <text:p text:style-name="P293">idoneidad del modelo lineal para este problema </text:p>
        </text:list-item>
      </text:list>
      <text:h text:style-name="P60" text:outline-level="3"><text:span text:style-name="Strong_20_Emphasis">6.2 Buen ajuste del modelo</text:span></text:h>
      <text:p text:style-name="Text_20_body">La recta de regresión se ajusta correctamente a la nube de puntos, lo que implica:</text:p>
      <text:list text:style-name="L143">
        <text:list-item>
          <text:p text:style-name="P294">error relativamente bajo </text:p>
        </text:list-item>
        <text:list-item>
          <text:p text:style-name="P295">capacidad predictiva adecuada </text:p>
        </text:list-item>
      </text:list>
      <text:h text:style-name="P60" text:outline-level="3"><text:span text:style-name="Strong_20_Emphasis"/></text:h>
      <text:h text:style-name="P60" text:outline-level="3"><text:span text:style-name="Strong_20_Emphasis">6.3 Presencia de ruido</text:span></text:h>
      <text:p text:style-name="Text_20_body">Se observan algunas desviaciones respecto a la recta, especialmente en valores intermedios, lo que indica:</text:p>
      <text:list text:style-name="L144">
        <text:list-item>
          <text:p text:style-name="P296">variabilidad natural del sistema </text:p>
        </text:list-item>
        <text:list-item>
          <text:p text:style-name="P297">posibles diferencias puntuales entre aulas </text:p>
        </text:list-item>
        <text:list-item>
          <text:p text:style-name="P297"/>
        </text:list-item>
      </text:list>
      <text:h text:style-name="P29" text:outline-level="2"><text:span text:style-name="Strong_20_Emphasis">7. Justificación técnica</text:span></text:h>
      <text:p text:style-name="Text_20_body">El uso de un modelo lineal presenta varias ventajas:</text:p>
      <text:h text:style-name="P60" text:outline-level="3"><text:span text:style-name="Strong_20_Emphasis">7.1 Simplicidad e interpretabilidad</text:span></text:h>
      <text:p text:style-name="Text_20_body">El modelo es fácil de entender y explicar, lo que facilita su inclusión en la memoria del proyecto.</text:p>
      <text:h text:style-name="P60" text:outline-level="3"><text:span text:style-name="Strong_20_Emphasis">7.2 Adecuación al problema</text:span></text:h>
      <text:p text:style-name="Text_20_body">Dado que ambas aulas presentan un comportamiento térmico similar, una relación lineal resulta suficiente para modelar la diferencia.</text:p>
      <text:h text:style-name="P60" text:outline-level="3"><text:span text:style-name="Strong_20_Emphasis">7.3 Mejora respecto a diferencia constante</text:span></text:h>
      <text:p text:style-name="Text_20_body">A diferencia del enfoque basado en un sesgo fijo, este modelo:</text:p>
      <text:list text:style-name="L145">
        <text:list-item>
          <text:p text:style-name="P298">permite ajustar pendiente e intercepto </text:p>
        </text:list-item>
        <text:list-item>
          <text:p text:style-name="P299">captura mejor variaciones en distintos rangos de temperatura </text:p>
        </text:list-item>
      </text:list>
      <text:h text:style-name="P29" text:outline-level="2"><text:soft-page-break/><text:span text:style-name="Strong_20_Emphasis">8. Limitaciones</text:span></text:h>
      <text:p text:style-name="Text_20_body">El modelo lineal presenta algunas limitaciones:</text:p>
      <text:list text:style-name="L146">
        <text:list-item>
          <text:p text:style-name="P300">no captura relaciones no lineales </text:p>
        </text:list-item>
        <text:list-item>
          <text:p text:style-name="P300">no considera variables externas (humedad, radiación solar, ocupación, etc.) </text:p>
        </text:list-item>
        <text:list-item>
          <text:p text:style-name="P301">asume una relación constante en todo el rango de valores </text:p>
        </text:list-item>
      </text:list>
      <text:p text:style-name="Text_20_body">No obstante, para el objetivo del proyecto, resulta una aproximación adecuada.</text:p>
      <text:p text:style-name="Text_20_body"/>
      <text:h text:style-name="P29" text:outline-level="2"><text:span text:style-name="Strong_20_Emphasis">9. Conclusión</text:span></text:h>
      <text:p text:style-name="Text_20_body">El modelo de regresión lineal permite estimar de forma fiable la temperatura del Aula 2 a partir de la del Aula 1, proporcionando una alternativa más flexible al modelo basado en diferencia media constante.</text:p>
      <text:p text:style-name="Text_20_body">Este enfoque cumple con el requisito del enunciado de construir un modelo de Machine Learning lineal y se integra dentro del pipeline de preparación de datos del proyecto.</text:p>
      <text:p text:style-name="Text_20_body">El modelo de regresión lineal permite pasar de una aproximación heurística basada en diferencias medias a un enfoque de aprendizaje automático, mejorando la capacidad de adaptación del modelo a distintos rangos de temperatura </text:p>
      <text:p text:style-name="Text_20_body"/>
      <text:p text:style-name="Text_20_body"><draw:frame draw:style-name="fr3" draw:name="Imagen13" text:anchor-type="char" svg:width="17cm" svg:height="7.022cm" draw:z-index="12"><draw:image xlink:href="Pictures/100000010000029C0000011464A41DE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220"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16:01:22.326785600</meta:creation-date>
    <dc:date>2026-03-31T19:01:35.269302900</dc:date>
    <meta:editing-duration>PT21M23S</meta:editing-duration>
    <meta:editing-cycles>7</meta:editing-cycles>
    <meta:generator>LibreOffice/25.8.5.2$Windows_X86_64 LibreOffice_project/9c8b85f387cc00a89945a79c9e6239f32e450ac2</meta:generator>
    <meta:document-statistic meta:table-count="2" meta:image-count="21" meta:object-count="0" meta:page-count="61" meta:paragraph-count="1149" meta:word-count="9625" meta:character-count="62707" meta:non-whitespace-character-count="54253"/>
  </office:meta>
</office:document-meta>
</file>